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B000001F4741F59A7.png" manifest:media-type="image/png"/>
  <manifest:file-entry manifest:full-path="Pictures/1000000000000320000003200DFCA8F2.png" manifest:media-type="image/png"/>
  <manifest:file-entry manifest:full-path="Pictures/10000000000004FF0000050F734ABC2C.png" manifest:media-type="image/png"/>
  <manifest:file-entry manifest:full-path="Pictures/10000000000002EE000001F4D76271C2.png" manifest:media-type="image/png"/>
  <manifest:file-entry manifest:full-path="Pictures/100000000000029B000001F4C4699DDB.png" manifest:media-type="image/png"/>
  <manifest:file-entry manifest:full-path="Pictures/10000000000003200000032092A550C8.png" manifest:media-type="image/png"/>
  <manifest:file-entry manifest:full-path="Pictures/1000000000000328000001F4458B9864.png" manifest:media-type="image/png"/>
  <manifest:file-entry manifest:full-path="Pictures/10000000000002EE000001F4E8783B27.png" manifest:media-type="image/png"/>
  <manifest:file-entry manifest:full-path="Pictures/100000000000025A000002FD61CE54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1a3a5c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ccc" draw:stroke-linejoin="round" svg:stroke-linecap="round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solid" draw:fill-color="#2b5a8c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7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0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7.1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4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8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3.36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solid" draw:fill-color="#1a3a5c"/>
    </style:style>
    <style:style style:name="P7" style:family="paragraph">
      <loext:graphic-properties draw:fill="none"/>
      <style:text-properties fo:font-size="8.5pt" style:font-size-asian="8.5pt" style:font-size-complex="8.5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solid" draw:fill-color="#2b5a8c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color="#1a3a5c" loext:opacity="100%" style:font-name="Microsoft YaHei" fo:font-size="22pt" fo:font-weight="normal" style:font-name-asian="Microsoft YaHei" style:font-size-asian="22pt" style:font-weight-asian="normal" style:font-name-complex="Microsoft YaHei" style:font-size-complex="22pt" style:font-weight-complex="normal"/>
    </style:style>
    <style:style style:name="T2" style:family="text">
      <style:text-properties fo:color="#000555" loext:opacity="100%" style:font-name="ZapfDingbats" fo:font-size="16pt" fo:font-weight="normal" style:font-name-asian="ZapfDingbats" style:font-size-asian="16pt" style:font-weight-asian="normal" style:font-name-complex="ZapfDingbats" style:font-size-complex="16pt" style:font-weight-complex="normal"/>
    </style:style>
    <style:style style:name="T3" style:family="text">
      <style:text-properties fo:color="#000555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4" style:family="text">
      <style:text-properties fo:color="#000333" loext:opacity="100%" style:font-name="Microsoft YaHei" fo:font-size="9.5pt" fo:font-weight="normal" style:font-name-asian="Microsoft YaHei" style:font-size-asian="9.5pt" style:font-weight-asian="normal" style:font-name-complex="Microsoft YaHei" style:font-size-complex="9.5pt" style:font-weight-complex="normal"/>
    </style:style>
    <style:style style:name="T5" style:family="text">
      <style:text-properties fo:color="#1a3a5c" loext:opacity="100%" style:font-name="Microsoft YaHei" fo:font-size="16pt" fo:font-weight="normal" style:font-name-asian="Microsoft YaHei" style:font-size-asian="16pt" style:font-weight-asian="normal" style:font-name-complex="Microsoft YaHei" style:font-size-complex="16pt" style:font-weight-complex="normal"/>
    </style:style>
    <style:style style:name="T6" style:family="text">
      <style:text-properties fo:color="#ffffff" loext:opacity="100%" style:font-name="Microsoft YaHei" fo:font-size="8.5pt" fo:font-weight="normal" style:font-name-asian="Microsoft YaHei" style:font-size-asian="8.5pt" style:font-weight-asian="normal" style:font-name-complex="Microsoft YaHei" style:font-size-complex="8.5pt" style:font-weight-complex="normal"/>
    </style:style>
    <style:style style:name="T7" style:family="text">
      <style:text-properties fo:color="#000333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style:style style:name="T8" style:family="text">
      <style:text-properties fo:color="#2b5a8c" loext:opacity="100%" style:font-name="Microsoft YaHei" fo:font-size="12pt" fo:font-weight="normal" style:font-name-asian="Microsoft YaHei" style:font-size-asian="12pt" style:font-weight-asian="normal" style:font-name-complex="Microsoft YaHei" style:font-size-complex="12pt" style:font-weight-complex="normal"/>
    </style:style>
    <style:style style:name="T9" style:family="text">
      <style:text-properties fo:color="#000888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371cm" svg:height="1.025cm" svg:x="2.301cm" svg:y="3.667cm">
          <draw:text-box>
            <text:p text:style-name="P1"><text:span text:style-name="T1">Cleanro</text:span><text:span text:style-name="T1">om </text:span><text:span text:style-name="T1">Wiper &amp; </text:span><text:span text:style-name="T1">Industri</text:span><text:span text:style-name="T1">al Wipe </text:span><text:span text:style-name="T1">Catalog</text:span></text:p>
          </draw:text-box>
        </draw:frame>
        <draw:frame draw:style-name="gr2" draw:text-style-name="P3" draw:layer="layout" svg:width="1.265cm" svg:height="0.563cm" svg:x="7.499cm" svg:y="5.343cm">
          <draw:text-box>
            <text:p text:style-name="P1"><text:span text:style-name="T2">■■■</text:span></text:p>
          </draw:text-box>
        </draw:frame>
        <draw:frame draw:style-name="gr2" draw:text-style-name="P3" draw:layer="layout" svg:width="0.69cm" svg:height="0.628cm" svg:x="8.788cm" svg:y="5.224cm">
          <draw:text-box>
            <text:p text:style-name="P1"><text:span text:style-name="T3"><text:s/>&amp; </text:span></text:p>
          </draw:text-box>
        </draw:frame>
        <draw:frame draw:style-name="gr2" draw:text-style-name="P3" draw:layer="layout" svg:width="2.107cm" svg:height="0.563cm" svg:x="9.478cm" svg:y="5.343cm">
          <draw:text-box>
            <text:p text:style-name="P1"><text:span text:style-name="T2">■■■■■</text:span></text:p>
          </draw:text-box>
        </draw:frame>
        <draw:frame draw:style-name="gr2" draw:text-style-name="P3" draw:layer="layout" svg:width="0.563cm" svg:height="0.628cm" svg:x="11.626cm" svg:y="5.2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999cm" svg:height="10.999cm" svg:x="5cm" svg:y="7.546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0.563cm" svg:x="11.783cm" svg:y="5.343cm">
          <draw:text-box>
            <text:p text:style-name="P1"><text:span text:style-name="T2">■■■■</text:span></text:p>
          </draw:text-box>
        </draw:frame>
        <draw:frame draw:style-name="gr4" draw:text-style-name="P5" draw:layer="layout" svg:width="9.086cm" svg:height="0.446cm" svg:x="1.712cm" svg:y="20.027cm">
          <draw:text-box>
            <text:p text:style-name="P1"><text:span text:style-name="T4">供应商</text:span><text:span text:style-name="T4">: </text:span><text:span text:style-name="T4">无锡源洁</text:span><text:span text:style-name="T4">无尘布</text:span><text:span text:style-name="T4">（</text:span><text:span text:style-name="T4">Yuanji</text:span><text:span text:style-name="T4">e </text:span><text:span text:style-name="T4">Cleanro</text:span><text:span text:style-name="T4">om </text:span><text:span text:style-name="T4">Products</text:span><text:span text:style-name="T4">）</text:span></text:p>
          </draw:text-box>
        </draw:frame>
        <draw:frame draw:style-name="gr4" draw:text-style-name="P5" draw:layer="layout" svg:width="4.868cm" svg:height="0.446cm" svg:x="1.712cm" svg:y="20.671cm">
          <draw:text-box>
            <text:p text:style-name="P1"><text:span text:style-name="T4">版本</text:span><text:span text:style-name="T4">: V2.0 | </text:span><text:span text:style-name="T4">日期</text:span><text:span text:style-name="T4">: 2026</text:span><text:span text:style-name="T4">年</text:span><text:span text:style-name="T4">7</text:span><text:span text:style-name="T4">月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8.234cm" svg:height="0.746cm" svg:x="1.712cm" svg:y="1.679cm">
          <draw:text-box>
            <text:p text:style-name="P1"><text:span text:style-name="T5">1. </text:span><text:span text:style-name="T5">公司</text:span><text:span text:style-name="T5">简介 </text:span><text:span text:style-name="T5">/ </text:span><text:span text:style-name="T5">Compan</text:span><text:span text:style-name="T5">y Profile</text:span></text:p>
          </draw:text-box>
        </draw:frame>
        <draw:frame draw:style-name="gr4" draw:text-style-name="P5" draw:layer="layout" svg:width="17.393cm" svg:height="0.446cm" svg:x="1.712cm" svg:y="2.768cm">
          <draw:text-box>
            <text:p text:style-name="P1"><text:span text:style-name="T4">无锡源洁无尘布产品有限</text:span><text:span text:style-name="T4">公司是一家专业生产无尘</text:span><text:span text:style-name="T4">布和工业擦拭布的制造</text:span><text:span text:style-name="T4">商，位于中国江苏省无锡</text:span><text:span text:style-name="T4">市。我们为电子、半</text:span></text:p>
          </draw:text-box>
        </draw:frame>
        <draw:frame draw:style-name="gr4" draw:text-style-name="P5" draw:layer="layout" svg:width="7.694cm" svg:height="0.446cm" svg:x="1.712cm" svg:y="3.262cm">
          <draw:text-box>
            <text:p text:style-name="P1"><text:span text:style-name="T4">导体、汽</text:span><text:span text:style-name="T4">车和制药</text:span><text:span text:style-name="T4">行业提供</text:span><text:span text:style-name="T4">高品质的</text:span><text:span text:style-name="T4">清洁解决</text:span><text:span text:style-name="T4">方案。</text:span></text:p>
          </draw:text-box>
        </draw:frame>
        <draw:frame draw:style-name="gr4" draw:text-style-name="P5" draw:layer="layout" svg:width="17.038cm" svg:height="0.446cm" svg:x="1.712cm" svg:y="3.906cm">
          <draw:text-box>
            <text:p text:style-name="P1"><text:span text:style-name="T4">Wuxi Yuanjie </text:span><text:span text:style-name="T4">Cleanroom </text:span><text:span text:style-name="T4">Products is a </text:span><text:span text:style-name="T4">professional </text:span><text:span text:style-name="T4">manufacturer </text:span><text:span text:style-name="T4">of cleanroom </text:span><text:span text:style-name="T4">wipers and </text:span><text:span text:style-name="T4">industrial </text:span><text:span text:style-name="T4">wipes</text:span></text:p>
          </draw:text-box>
        </draw:frame>
        <draw:frame draw:style-name="gr4" draw:text-style-name="P5" draw:layer="layout" svg:width="17.25cm" svg:height="0.446cm" svg:x="1.712cm" svg:y="4.4cm">
          <draw:text-box>
            <text:p text:style-name="P1"><text:span text:style-name="T4">based in </text:span><text:span text:style-name="T4">Wuxi, </text:span><text:span text:style-name="T4">Jiangsu, </text:span><text:span text:style-name="T4">China. We </text:span><text:span text:style-name="T4">supply </text:span><text:span text:style-name="T4">high-quality </text:span><text:span text:style-name="T4">cleaning </text:span><text:span text:style-name="T4">solutions for </text:span><text:span text:style-name="T4">the </text:span><text:span text:style-name="T4">electronics, </text:span><text:span text:style-name="T4">semiconduc</text:span><text:span text:style-name="T4">tor,</text:span></text:p>
          </draw:text-box>
        </draw:frame>
        <draw:frame draw:style-name="gr3" draw:text-style-name="P4" draw:layer="layout" svg:width="5.431cm" svg:height="5.499cm" svg:x="1.784cm" svg:y="5.963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7.75cm" svg:y="5.963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13.75cm" svg:y="5.963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4" draw:text-style-name="P5" draw:layer="layout" svg:width="6.902cm" svg:height="0.446cm" svg:x="1.712cm" svg:y="4.894cm">
          <draw:text-box>
            <text:p text:style-name="P1"><text:span text:style-name="T4">automotive, </text:span><text:span text:style-name="T4">and </text:span><text:span text:style-name="T4">pharmaceutica</text:span><text:span text:style-name="T4">l industries.</text:span></text:p>
          </draw:text-box>
        </draw:frame>
      </draw:page>
      <draw:page draw:name="page3" draw:style-name="dp1" draw:master-page-name="master-page31">
        <draw:frame draw:style-name="gr2" draw:text-style-name="P3" draw:layer="layout" svg:width="8.869cm" svg:height="0.746cm" svg:x="1.712cm" svg:y="1.679cm">
          <draw:text-box>
            <text:p text:style-name="P1"><text:span text:style-name="T5">2. </text:span><text:span text:style-name="T5">生</text:span><text:span text:style-name="T5">产现</text:span><text:span text:style-name="T5">场 </text:span><text:span text:style-name="T5">/ </text:span><text:span text:style-name="T5">Fact</text:span><text:span text:style-name="T5">ory </text:span><text:span text:style-name="T5">Prod</text:span><text:span text:style-name="T5">uctio</text:span><text:span text:style-name="T5">n</text:span></text:p>
          </draw:text-box>
        </draw:frame>
        <draw:frame draw:style-name="gr4" draw:text-style-name="P5" draw:layer="layout" svg:width="11.038cm" svg:height="0.446cm" svg:x="1.712cm" svg:y="2.768cm">
          <draw:text-box>
            <text:p text:style-name="P1"><text:span text:style-name="T4">以下是源洁</text:span><text:span text:style-name="T4">工厂的生产</text:span><text:span text:style-name="T4">现场图片，</text:span><text:span text:style-name="T4">展示了无尘</text:span><text:span text:style-name="T4">布的生产、</text:span><text:span text:style-name="T4">切割和包装</text:span><text:span text:style-name="T4">流程。</text:span></text:p>
          </draw:text-box>
        </draw:frame>
        <draw:frame draw:style-name="gr3" draw:text-style-name="P4" draw:layer="layout" svg:width="10.503cm" svg:height="6.499cm" svg:x="0.748cm" svg:y="4.481cm">
          <draw:image xlink:href="Pictures/1000000000000328000001F4458B9864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0.665cm" svg:y="4.481cm">
          <draw:image xlink:href="Pictures/100000000000029B000001F4C4699DDB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.665cm" svg:y="11.493cm">
          <draw:image xlink:href="Pictures/100000000000029B000001F4741F59A7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10.125cm" svg:y="11.493cm">
          <draw:image xlink:href="Pictures/10000000000002EE000001F4D76271C2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5.625cm" svg:y="18.399cm">
          <draw:image xlink:href="Pictures/10000000000002EE000001F4E8783B27.png" xlink:type="simple" xlink:show="embed" xlink:actuate="onLoad" draw:mime-type="image/png">
            <text:p/>
          </draw:image>
        </draw:frame>
        <draw:frame draw:style-name="gr4" draw:text-style-name="P5" draw:layer="layout" svg:width="14.656cm" svg:height="0.446cm" svg:x="1.712cm" svg:y="3.412cm">
          <draw:text-box>
            <text:p text:style-name="P1"><text:span text:style-name="T4">Below are production site photos from Yuanjie </text:span><text:span text:style-name="T4">factory, showing the manufacturing process.</text:span></text:p>
          </draw:text-box>
        </draw:frame>
        <draw:frame draw:style-name="gr3" draw:text-style-name="P4" draw:layer="layout" svg:width="3.147cm" svg:height="4.0cm" svg:x="8.926cm" svg:y="25.3cm">
          <draw:image xlink:href="Pictures/100000000000025A000002FD61CE5408.png" xlink:type="simple" xlink:show="embed" xlink:actuate="onLoad" draw:mime-type="image/png">
            <text:p/>
          </draw:image>
        </draw:frame>
      </draw:page>
      <draw:page draw:name="page5" draw:style-name="dp1" draw:master-page-name="master-page37">
        <draw:frame draw:style-name="gr2" draw:text-style-name="P3" draw:layer="layout" svg:width="13.451cm" svg:height="0.746cm" svg:x="1.712cm" svg:y="1.679cm">
          <draw:text-box>
            <text:p text:style-name="P1"><text:span text:style-name="T5">3. DS</text:span><text:span text:style-name="T5">系列 </text:span><text:span text:style-name="T5">- </text:span><text:span text:style-name="T5">电子级 </text:span><text:span text:style-name="T5">/ </text:span><text:span text:style-name="T5">DS Series - Electronic </text:span><text:span text:style-name="T5">Grade</text:span></text:p>
          </draw:text-box>
        </draw:frame>
        <draw:frame draw:style-name="gr4" draw:text-style-name="P5" draw:layer="layout" svg:width="8.022cm" svg:height="0.446cm" svg:x="1.712cm" svg:y="2.768cm">
          <draw:text-box>
            <text:p text:style-name="P1"><text:span text:style-name="T4">材质</text:span><text:span text:style-name="T4">: </text:span><text:span text:style-name="T4">聚酯</text:span><text:span text:style-name="T4">+</text:span><text:span text:style-name="T4">尼龙针织 </text:span><text:span text:style-name="T4">/ Polyester + </text:span><text:span text:style-name="T4">Nylon Knitted</text:span></text:p>
          </draw:text-box>
        </draw:frame>
        <draw:frame draw:style-name="gr4" draw:text-style-name="P5" draw:layer="layout" svg:width="3.8cm" svg:height="0.446cm" svg:x="1.712cm" svg:y="3.412cm">
          <draw:text-box>
            <text:p text:style-name="P1"><text:span text:style-name="T4">洁净度</text:span><text:span text:style-name="T4">: Class 100~1000</text:span></text:p>
          </draw:text-box>
        </draw:frame>
        <draw:frame draw:style-name="gr4" draw:text-style-name="P5" draw:layer="layout" svg:width="6.146cm" svg:height="0.446cm" svg:x="1.712cm" svg:y="4.056cm">
          <draw:text-box>
            <text:p text:style-name="P1"><text:span text:style-name="T4">切割方式</text:span><text:span text:style-name="T4">: </text:span><text:span text:style-name="T4">激光</text:span><text:span text:style-name="T4">(</text:span><text:span text:style-name="T4">标准</text:span><text:span text:style-name="T4">) / </text:span><text:span text:style-name="T4">超声波 </text:span><text:span text:style-name="T4">/ </text:span><text:span text:style-name="T4">冷切</text:span></text:p>
          </draw:text-box>
        </draw:frame>
        <draw:polygon draw:style-name="gr5" draw:text-style-name="P6" draw:layer="layout" svg:width="17.999cm" svg:height="0.636cm" svg:x="1.5cm" svg:y="5.563cm" svg:viewBox="0 0 18000 637" draw:points="0,0 18000,0 18000,637 0,637">
          <text:p/>
        </draw:polygon>
        <draw:frame draw:style-name="gr4" draw:text-style-name="P5" draw:layer="layout" svg:width="3.704cm" svg:height="0.446cm" svg:x="1.712cm" svg:y="4.7cm">
          <draw:text-box>
            <text:p text:style-name="P1"><text:span text:style-name="T4">标准颜色</text:span><text:span text:style-name="T4">: </text:span><text:span text:style-name="T4">白、蓝、米色</text:span></text:p>
          </draw:text-box>
        </draw:frame>
        <draw:frame draw:style-name="gr6" draw:text-style-name="P7" draw:layer="layout" svg:width="0.603cm" svg:height="0.399cm" svg:x="2.888cm" svg:y="5.652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5.888cm" svg:y="5.652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8.513cm" svg:y="5.652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0.942cm" svg:y="5.652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4.138cm" svg:y="5.652cm">
          <draw:text-box>
            <text:p text:style-name="P1"><text:span text:style-name="T6">包装</text:span></text:p>
          </draw:text-box>
        </draw:frame>
        <draw:frame draw:style-name="gr6" draw:text-style-name="P7" draw:layer="layout" svg:width="0.904cm" svg:height="0.399cm" svg:x="17.363cm" svg:y="5.652cm">
          <draw:text-box>
            <text:p text:style-name="P1"><text:span text:style-name="T6">洁净度</text:span></text:p>
          </draw:text-box>
        </draw:frame>
        <draw:frame draw:style-name="gr7" draw:text-style-name="P8" draw:layer="layout" svg:width="1.17cm" svg:height="0.378cm" svg:x="2.607cm" svg:y="6.288cm">
          <draw:text-box>
            <text:p text:style-name="P1"><text:span text:style-name="T7">DS-0404</text:span></text:p>
          </draw:text-box>
        </draw:frame>
        <draw:frame draw:style-name="gr7" draw:text-style-name="P8" draw:layer="layout" svg:width="0.478cm" svg:height="0.378cm" svg:x="5.95cm" svg:y="6.288cm">
          <draw:text-box>
            <text:p text:style-name="P1"><text:span text:style-name="T7">4x4</text:span></text:p>
          </draw:text-box>
        </draw:frame>
        <draw:frame draw:style-name="gr7" draw:text-style-name="P8" draw:layer="layout" svg:width="0.811cm" svg:height="0.378cm" svg:x="8.41cm" svg:y="6.288cm">
          <draw:text-box>
            <text:p text:style-name="P1"><text:span text:style-name="T7">10x10</text:span></text:p>
          </draw:text-box>
        </draw:frame>
        <draw:frame draw:style-name="gr7" draw:text-style-name="P8" draw:layer="layout" svg:width="0.569cm" svg:height="0.378cm" svg:x="11.155cm" svg:y="6.288cm">
          <draw:text-box>
            <text:p text:style-name="P1"><text:span text:style-name="T7">0.12</text:span></text:p>
          </draw:text-box>
        </draw:frame>
        <draw:frame draw:style-name="gr7" draw:text-style-name="P8" draw:layer="layout" svg:width="0.958cm" svg:height="0.378cm" svg:x="13.962cm" svg:y="6.28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6.288cm">
          <draw:text-box>
            <text:p text:style-name="P1"><text:span text:style-name="T7">C100-</text:span><text:span text:style-name="T7">1000</text:span></text:p>
          </draw:text-box>
        </draw:frame>
        <draw:frame draw:style-name="gr7" draw:text-style-name="P8" draw:layer="layout" svg:width="1.17cm" svg:height="0.378cm" svg:x="2.607cm" svg:y="6.888cm">
          <draw:text-box>
            <text:p text:style-name="P1"><text:span text:style-name="T7">DS-0606</text:span></text:p>
          </draw:text-box>
        </draw:frame>
        <draw:frame draw:style-name="gr7" draw:text-style-name="P8" draw:layer="layout" svg:width="0.478cm" svg:height="0.378cm" svg:x="5.95cm" svg:y="6.88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8.41cm" svg:y="6.88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69cm" svg:height="0.378cm" svg:x="11.155cm" svg:y="6.888cm">
          <draw:text-box>
            <text:p text:style-name="P1"><text:span text:style-name="T7">0.25</text:span></text:p>
          </draw:text-box>
        </draw:frame>
        <draw:frame draw:style-name="gr7" draw:text-style-name="P8" draw:layer="layout" svg:width="0.958cm" svg:height="0.378cm" svg:x="13.962cm" svg:y="6.88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6.888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7.487cm">
          <draw:text-box>
            <text:p text:style-name="P1"><text:span text:style-name="T7">DS-0909</text:span></text:p>
          </draw:text-box>
        </draw:frame>
        <draw:frame draw:style-name="gr7" draw:text-style-name="P8" draw:layer="layout" svg:width="0.478cm" svg:height="0.378cm" svg:x="5.95cm" svg:y="7.487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8.177cm" svg:y="7.487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69cm" svg:height="0.378cm" svg:x="11.155cm" svg:y="7.487cm">
          <draw:text-box>
            <text:p text:style-name="P1"><text:span text:style-name="T7">0.45</text:span></text:p>
          </draw:text-box>
        </draw:frame>
        <draw:frame draw:style-name="gr7" draw:text-style-name="P8" draw:layer="layout" svg:width="0.958cm" svg:height="0.378cm" svg:x="13.962cm" svg:y="7.48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7.48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8.087cm">
          <draw:text-box>
            <text:p text:style-name="P1"><text:span text:style-name="T7">DS-1212</text:span></text:p>
          </draw:text-box>
        </draw:frame>
        <draw:frame draw:style-name="gr7" draw:text-style-name="P8" draw:layer="layout" svg:width="0.811cm" svg:height="0.378cm" svg:x="5.785cm" svg:y="8.087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8.41cm" svg:y="8.087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69cm" svg:height="0.378cm" svg:x="11.155cm" svg:y="8.087cm">
          <draw:text-box>
            <text:p text:style-name="P1"><text:span text:style-name="T7">0.70</text:span></text:p>
          </draw:text-box>
        </draw:frame>
        <draw:frame draw:style-name="gr7" draw:text-style-name="P8" draw:layer="layout" svg:width="0.958cm" svg:height="0.378cm" svg:x="13.962cm" svg:y="8.08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8.08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8.687cm">
          <draw:text-box>
            <text:p text:style-name="P1"><text:span text:style-name="T7">DS-1818</text:span></text:p>
          </draw:text-box>
        </draw:frame>
        <draw:frame draw:style-name="gr7" draw:text-style-name="P8" draw:layer="layout" svg:width="0.811cm" svg:height="0.378cm" svg:x="5.785cm" svg:y="8.687cm">
          <draw:text-box>
            <text:p text:style-name="P1"><text:span text:style-name="T7">18x18</text:span></text:p>
          </draw:text-box>
        </draw:frame>
        <draw:frame draw:style-name="gr7" draw:text-style-name="P8" draw:layer="layout" svg:width="0.811cm" svg:height="0.378cm" svg:x="8.41cm" svg:y="8.687cm">
          <draw:text-box>
            <text:p text:style-name="P1"><text:span text:style-name="T7">45x45</text:span></text:p>
          </draw:text-box>
        </draw:frame>
        <draw:frame draw:style-name="gr7" draw:text-style-name="P8" draw:layer="layout" svg:width="0.569cm" svg:height="0.378cm" svg:x="11.155cm" svg:y="8.687cm">
          <draw:text-box>
            <text:p text:style-name="P1"><text:span text:style-name="T7">1.85</text:span></text:p>
          </draw:text-box>
        </draw:frame>
        <draw:frame draw:style-name="gr7" draw:text-style-name="P8" draw:layer="layout" svg:width="0.958cm" svg:height="0.378cm" svg:x="13.962cm" svg:y="8.687cm">
          <draw:text-box>
            <text:p text:style-name="P1"><text:span text:style-name="T7">100/pk</text:span></text:p>
          </draw:text-box>
        </draw:frame>
        <draw:line draw:style-name="gr8" draw:text-style-name="P4" draw:layer="layout" svg:x1="1.5cm" svg:y1="5.563cm" svg:x2="19.499cm" svg:y2="5.563cm">
          <text:p/>
        </draw:line>
        <draw:line draw:style-name="gr8" draw:text-style-name="P4" draw:layer="layout" svg:x1="1.5cm" svg:y1="9.196cm" svg:x2="19.499cm" svg:y2="9.196cm">
          <text:p/>
        </draw:line>
        <draw:line draw:style-name="gr8" draw:text-style-name="P4" draw:layer="layout" svg:x1="1.5cm" svg:y1="9.196cm" svg:x2="1.5cm" svg:y2="5.563cm">
          <text:p/>
        </draw:line>
        <draw:line draw:style-name="gr8" draw:text-style-name="P4" draw:layer="layout" svg:x1="19.499cm" svg:y1="9.196cm" svg:x2="19.499cm" svg:y2="5.563cm">
          <text:p/>
        </draw:line>
        <draw:line draw:style-name="gr8" draw:text-style-name="P4" draw:layer="layout" svg:x1="1.5cm" svg:y1="6.198cm" svg:x2="19.499cm" svg:y2="6.198cm">
          <text:p/>
        </draw:line>
        <draw:line draw:style-name="gr8" draw:text-style-name="P4" draw:layer="layout" svg:x1="1.5cm" svg:y1="6.798cm" svg:x2="19.499cm" svg:y2="6.798cm">
          <text:p/>
        </draw:line>
        <draw:line draw:style-name="gr8" draw:text-style-name="P4" draw:layer="layout" svg:x1="1.5cm" svg:y1="7.397cm" svg:x2="19.499cm" svg:y2="7.397cm">
          <text:p/>
        </draw:line>
        <draw:line draw:style-name="gr8" draw:text-style-name="P4" draw:layer="layout" svg:x1="1.5cm" svg:y1="7.997cm" svg:x2="19.499cm" svg:y2="7.997cm">
          <text:p/>
        </draw:line>
        <draw:line draw:style-name="gr8" draw:text-style-name="P4" draw:layer="layout" svg:x1="1.5cm" svg:y1="8.597cm" svg:x2="19.499cm" svg:y2="8.597cm">
          <text:p/>
        </draw:line>
        <draw:line draw:style-name="gr8" draw:text-style-name="P4" draw:layer="layout" svg:x1="4.875cm" svg:y1="9.196cm" svg:x2="4.875cm" svg:y2="5.563cm">
          <text:p/>
        </draw:line>
        <draw:line draw:style-name="gr8" draw:text-style-name="P4" draw:layer="layout" svg:x1="7.499cm" svg:y1="9.196cm" svg:x2="7.499cm" svg:y2="5.563cm">
          <text:p/>
        </draw:line>
        <draw:line draw:style-name="gr8" draw:text-style-name="P4" draw:layer="layout" svg:x1="10.125cm" svg:y1="9.196cm" svg:x2="10.125cm" svg:y2="5.563cm">
          <text:p/>
        </draw:line>
        <draw:line draw:style-name="gr8" draw:text-style-name="P4" draw:layer="layout" svg:x1="12.749cm" svg:y1="9.196cm" svg:x2="12.749cm" svg:y2="5.563cm">
          <text:p/>
        </draw:line>
        <draw:line draw:style-name="gr8" draw:text-style-name="P4" draw:layer="layout" svg:x1="16.124cm" svg:y1="9.196cm" svg:x2="16.124cm" svg:y2="5.563cm">
          <text:p/>
        </draw:line>
        <draw:frame draw:style-name="gr3" draw:text-style-name="P4" draw:layer="layout" svg:width="5.499cm" svg:height="5.499cm" svg:x="7.75cm" svg:y="9.497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7" draw:text-style-name="P8" draw:layer="layout" svg:width="1.479cm" svg:height="0.378cm" svg:x="17.078cm" svg:y="8.687cm">
          <draw:text-box>
            <text:p text:style-name="P1"><text:span text:style-name="T7">C100-1000</text:span></text:p>
          </draw:text-box>
        </draw:frame>
      </draw:page>
      <draw:page draw:name="page6" draw:style-name="dp1" draw:master-page-name="master-page52">
        <draw:frame draw:style-name="gr2" draw:text-style-name="P3" draw:layer="layout" svg:width="13.46cm" svg:height="0.746cm" svg:x="1.712cm" svg:y="1.679cm">
          <draw:text-box>
            <text:p text:style-name="P1"><text:span text:style-name="T5">4. KH</text:span><text:span text:style-name="T5">系列 </text:span><text:span text:style-name="T5">- </text:span><text:span text:style-name="T5">工业级 </text:span><text:span text:style-name="T5">/ KH Series - Industrial Wipes</text:span></text:p>
          </draw:text-box>
        </draw:frame>
        <draw:frame draw:style-name="gr4" draw:text-style-name="P5" draw:layer="layout" svg:width="4.628cm" svg:height="0.446cm" svg:x="1.712cm" svg:y="2.768cm">
          <draw:text-box>
            <text:p text:style-name="P1"><text:span text:style-name="T4">材质</text:span><text:span text:style-name="T4">: </text:span><text:span text:style-name="T4">聚酯针织 </text:span><text:span text:style-name="T4">(</text:span><text:span text:style-name="T4">非无尘室级</text:span><text:span text:style-name="T4">)</text:span></text:p>
          </draw:text-box>
        </draw:frame>
        <draw:polygon draw:style-name="gr9" draw:text-style-name="P9" draw:layer="layout" svg:width="17.999cm" svg:height="0.636cm" svg:x="1.5cm" svg:y="4.075cm" svg:viewBox="0 0 18000 637" draw:points="0,0 18000,0 18000,637 0,637">
          <text:p/>
        </draw:polygon>
        <draw:frame draw:style-name="gr4" draw:text-style-name="P5" draw:layer="layout" svg:width="4.038cm" svg:height="0.446cm" svg:x="1.712cm" svg:y="3.412cm">
          <draw:text-box>
            <text:p text:style-name="P1"><text:span text:style-name="T4">应用</text:span><text:span text:style-name="T4">: </text:span><text:span text:style-name="T4">一般工业清洁、车间</text:span></text:p>
          </draw:text-box>
        </draw:frame>
        <draw:frame draw:style-name="gr6" draw:text-style-name="P7" draw:layer="layout" svg:width="0.603cm" svg:height="0.399cm" svg:x="3.2cm" svg:y="4.164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6.8cm" svg:y="4.164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10cm" svg:y="4.164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3.204cm" svg:y="4.164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7.2cm" svg:y="4.164cm">
          <draw:text-box>
            <text:p text:style-name="P1"><text:span text:style-name="T6">包装</text:span></text:p>
          </draw:text-box>
        </draw:frame>
        <draw:frame draw:style-name="gr7" draw:text-style-name="P8" draw:layer="layout" svg:width="1.189cm" svg:height="0.378cm" svg:x="2.909cm" svg:y="4.8cm">
          <draw:text-box>
            <text:p text:style-name="P1"><text:span text:style-name="T7">KH-0606</text:span></text:p>
          </draw:text-box>
        </draw:frame>
        <draw:frame draw:style-name="gr7" draw:text-style-name="P8" draw:layer="layout" svg:width="0.478cm" svg:height="0.378cm" svg:x="6.863cm" svg:y="4.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9.897cm" svg:y="4.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59cm" svg:height="0.378cm" svg:x="13.423cm" svg:y="4.8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4.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4cm">
          <draw:text-box>
            <text:p text:style-name="P1"><text:span text:style-name="T7">KH-0909</text:span></text:p>
          </draw:text-box>
        </draw:frame>
        <draw:frame draw:style-name="gr7" draw:text-style-name="P8" draw:layer="layout" svg:width="0.478cm" svg:height="0.378cm" svg:x="6.863cm" svg:y="5.4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9.664cm" svg:y="5.4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59cm" svg:height="0.378cm" svg:x="13.423cm" svg:y="5.4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5.4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999cm">
          <draw:text-box>
            <text:p text:style-name="P1"><text:span text:style-name="T7">KH-1212</text:span></text:p>
          </draw:text-box>
        </draw:frame>
        <draw:frame draw:style-name="gr7" draw:text-style-name="P8" draw:layer="layout" svg:width="0.811cm" svg:height="0.378cm" svg:x="6.697cm" svg:y="5.999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9.897cm" svg:y="5.999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59cm" svg:height="0.378cm" svg:x="13.423cm" svg:y="5.999cm">
          <draw:text-box>
            <text:p text:style-name="P1"><text:span text:style-name="T7">TBD</text:span></text:p>
          </draw:text-box>
        </draw:frame>
        <draw:line draw:style-name="gr8" draw:text-style-name="P4" draw:layer="layout" svg:x1="1.5cm" svg:y1="4.075cm" svg:x2="19.499cm" svg:y2="4.075cm">
          <text:p/>
        </draw:line>
        <draw:line draw:style-name="gr8" draw:text-style-name="P4" draw:layer="layout" svg:x1="1.5cm" svg:y1="6.509cm" svg:x2="19.499cm" svg:y2="6.509cm">
          <text:p/>
        </draw:line>
        <draw:line draw:style-name="gr8" draw:text-style-name="P4" draw:layer="layout" svg:x1="1.5cm" svg:y1="6.509cm" svg:x2="1.5cm" svg:y2="4.075cm">
          <text:p/>
        </draw:line>
        <draw:line draw:style-name="gr8" draw:text-style-name="P4" draw:layer="layout" svg:x1="19.499cm" svg:y1="6.509cm" svg:x2="19.499cm" svg:y2="4.075cm">
          <text:p/>
        </draw:line>
        <draw:line draw:style-name="gr8" draw:text-style-name="P4" draw:layer="layout" svg:x1="1.5cm" svg:y1="4.71cm" svg:x2="19.499cm" svg:y2="4.71cm">
          <text:p/>
        </draw:line>
        <draw:line draw:style-name="gr8" draw:text-style-name="P4" draw:layer="layout" svg:x1="1.5cm" svg:y1="5.31cm" svg:x2="19.499cm" svg:y2="5.31cm">
          <text:p/>
        </draw:line>
        <draw:line draw:style-name="gr8" draw:text-style-name="P4" draw:layer="layout" svg:x1="1.5cm" svg:y1="5.91cm" svg:x2="19.499cm" svg:y2="5.91cm">
          <text:p/>
        </draw:line>
        <draw:line draw:style-name="gr8" draw:text-style-name="P4" draw:layer="layout" svg:x1="5.499cm" svg:y1="6.509cm" svg:x2="5.499cm" svg:y2="4.075cm">
          <text:p/>
        </draw:line>
        <draw:line draw:style-name="gr8" draw:text-style-name="P4" draw:layer="layout" svg:x1="8.7cm" svg:y1="6.509cm" svg:x2="8.7cm" svg:y2="4.075cm">
          <text:p/>
        </draw:line>
        <draw:line draw:style-name="gr8" draw:text-style-name="P4" draw:layer="layout" svg:x1="11.899cm" svg:y1="6.509cm" svg:x2="11.899cm" svg:y2="4.075cm">
          <text:p/>
        </draw:line>
        <draw:line draw:style-name="gr8" draw:text-style-name="P4" draw:layer="layout" svg:x1="15.5cm" svg:y1="6.509cm" svg:x2="15.5cm" svg:y2="4.075cm">
          <text:p/>
        </draw:line>
        <draw:frame draw:style-name="gr7" draw:text-style-name="P8" draw:layer="layout" svg:width="0.958cm" svg:height="0.378cm" svg:x="17.025cm" svg:y="5.999cm">
          <draw:text-box>
            <text:p text:style-name="P1"><text:span text:style-name="T7">100/pk</text:span></text:p>
          </draw:text-box>
        </draw:frame>
        <draw:frame draw:style-name="gr3" draw:text-style-name="P4" draw:layer="layout" svg:width="4.937cm" svg:height="4.999cm" svg:x="8.031cm" svg:y="7.454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4" draw:text-style-name="P5" draw:layer="layout" svg:width="3.839cm" svg:height="0.446cm" svg:x="1.712cm" svg:y="6.49cm">
          <draw:text-box>
            <text:p text:style-name="P1"><text:span text:style-name="T4">注</text:span><text:span text:style-name="T4">: KH</text:span><text:span text:style-name="T4">重量待工厂确认。</text:span></text:p>
          </draw:text-box>
        </draw:frame>
      </draw:page>
      <draw:page draw:name="page7" draw:style-name="dp1" draw:master-page-name="master-page67">
        <draw:polygon draw:style-name="gr5" draw:text-style-name="P6" draw:layer="layout" svg:width="17.999cm" svg:height="0.636cm" svg:x="1.5cm" svg:y="2.787cm" svg:viewBox="0 0 18000 637" draw:points="0,0 18000,0 18000,637 0,637">
          <text:p/>
        </draw:polygon>
        <draw:frame draw:style-name="gr2" draw:text-style-name="P3" draw:layer="layout" svg:width="8.841cm" svg:height="0.746cm" svg:x="1.712cm" svg:y="1.679cm">
          <draw:text-box>
            <text:p text:style-name="P1"><text:span text:style-name="T5">6. </text:span><text:span text:style-name="T5">包装选项 </text:span><text:span text:style-name="T5">/ Packaging Options</text:span></text:p>
          </draw:text-box>
        </draw:frame>
        <draw:frame draw:style-name="gr6" draw:text-style-name="P7" draw:layer="layout" svg:width="1.465cm" svg:height="0.399cm" svg:x="4.41cm" svg:y="2.876cm">
          <draw:text-box>
            <text:p text:style-name="P1"><text:span text:style-name="T6">类型 </text:span><text:span text:style-name="T6">Type</text:span></text:p>
          </draw:text-box>
        </draw:frame>
        <draw:frame draw:style-name="gr6" draw:text-style-name="P7" draw:layer="layout" svg:width="2.415cm" svg:height="0.399cm" svg:x="12.936cm" svg:y="2.87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192cm" svg:height="0.378cm" svg:x="4.048cm" svg:y="3.512cm">
          <draw:text-box>
            <text:p text:style-name="P1"><text:span text:style-name="T7">塑料袋 </text:span><text:span text:style-name="T7">Poly Bag</text:span></text:p>
          </draw:text-box>
        </draw:frame>
        <draw:frame draw:style-name="gr7" draw:text-style-name="P8" draw:layer="layout" svg:width="2.833cm" svg:height="0.378cm" svg:x="12.804cm" svg:y="3.512cm">
          <draw:text-box>
            <text:p text:style-name="P1"><text:span text:style-name="T7">100</text:span><text:span text:style-name="T7">片</text:span><text:span text:style-name="T7">/</text:span><text:span text:style-name="T7">包，标准包装</text:span></text:p>
          </draw:text-box>
        </draw:frame>
        <draw:frame draw:style-name="gr7" draw:text-style-name="P8" draw:layer="layout" svg:width="3.112cm" svg:height="0.378cm" svg:x="3.59cm" svg:y="4.112cm">
          <draw:text-box>
            <text:p text:style-name="P1"><text:span text:style-name="T7">真空包装 </text:span><text:span text:style-name="T7">Vacuum Pack</text:span></text:p>
          </draw:text-box>
        </draw:frame>
        <draw:frame draw:style-name="gr7" draw:text-style-name="P8" draw:layer="layout" svg:width="1.987cm" svg:height="0.378cm" svg:x="13.112cm" svg:y="4.112cm">
          <draw:text-box>
            <text:p text:style-name="P1"><text:span text:style-name="T7">用于高洁净要求</text:span></text:p>
          </draw:text-box>
        </draw:frame>
        <draw:frame draw:style-name="gr7" draw:text-style-name="P8" draw:layer="layout" svg:width="3.408cm" svg:height="0.378cm" svg:x="3.443cm" svg:y="4.712cm">
          <draw:text-box>
            <text:p text:style-name="P1"><text:span text:style-name="T7">双层包装 </text:span><text:span text:style-name="T7">Double Bagged</text:span></text:p>
          </draw:text-box>
        </draw:frame>
        <draw:frame draw:style-name="gr7" draw:text-style-name="P8" draw:layer="layout" svg:width="3.429cm" svg:height="0.378cm" svg:x="12.469cm" svg:y="4.712cm">
          <draw:text-box>
            <text:p text:style-name="P1"><text:span text:style-name="T7">用于</text:span><text:span text:style-name="T7">Class 100~1000</text:span><text:span text:style-name="T7">环境</text:span></text:p>
          </draw:text-box>
        </draw:frame>
        <draw:frame draw:style-name="gr7" draw:text-style-name="P8" draw:layer="layout" svg:width="2.022cm" svg:height="0.378cm" svg:x="4.132cm" svg:y="5.311cm">
          <draw:text-box>
            <text:p text:style-name="P1"><text:span text:style-name="T7">散装 </text:span><text:span text:style-name="T7">Bulk Pack</text:span></text:p>
          </draw:text-box>
        </draw:frame>
        <draw:line draw:style-name="gr8" draw:text-style-name="P4" draw:layer="layout" svg:x1="1.5cm" svg:y1="2.787cm" svg:x2="19.499cm" svg:y2="2.787cm">
          <text:p/>
        </draw:line>
        <draw:line draw:style-name="gr8" draw:text-style-name="P4" draw:layer="layout" svg:x1="1.5cm" svg:y1="5.821cm" svg:x2="19.499cm" svg:y2="5.821cm">
          <text:p/>
        </draw:line>
        <draw:line draw:style-name="gr8" draw:text-style-name="P4" draw:layer="layout" svg:x1="1.5cm" svg:y1="5.821cm" svg:x2="1.5cm" svg:y2="2.787cm">
          <text:p/>
        </draw:line>
        <draw:line draw:style-name="gr8" draw:text-style-name="P4" draw:layer="layout" svg:x1="19.499cm" svg:y1="5.821cm" svg:x2="19.499cm" svg:y2="2.787cm">
          <text:p/>
        </draw:line>
        <draw:line draw:style-name="gr8" draw:text-style-name="P4" draw:layer="layout" svg:x1="1.5cm" svg:y1="3.422cm" svg:x2="19.499cm" svg:y2="3.422cm">
          <text:p/>
        </draw:line>
        <draw:line draw:style-name="gr8" draw:text-style-name="P4" draw:layer="layout" svg:x1="1.5cm" svg:y1="4.022cm" svg:x2="19.499cm" svg:y2="4.022cm">
          <text:p/>
        </draw:line>
        <draw:line draw:style-name="gr8" draw:text-style-name="P4" draw:layer="layout" svg:x1="1.5cm" svg:y1="4.622cm" svg:x2="19.499cm" svg:y2="4.622cm">
          <text:p/>
        </draw:line>
        <draw:line draw:style-name="gr8" draw:text-style-name="P4" draw:layer="layout" svg:x1="1.5cm" svg:y1="5.221cm" svg:x2="19.499cm" svg:y2="5.221cm">
          <text:p/>
        </draw:line>
        <draw:line draw:style-name="gr8" draw:text-style-name="P4" draw:layer="layout" svg:x1="8.7cm" svg:y1="5.821cm" svg:x2="8.7cm" svg:y2="2.787cm">
          <text:p/>
        </draw:line>
        <draw:frame draw:style-name="gr7" draw:text-style-name="P8" draw:layer="layout" svg:width="2.271cm" svg:height="0.378cm" svg:x="12.971cm" svg:y="5.311cm">
          <draw:text-box>
            <text:p text:style-name="P1"><text:span text:style-name="T7">工业级，经济实惠</text:span></text:p>
          </draw:text-box>
        </draw:frame>
        <draw:polygon draw:style-name="gr5" draw:text-style-name="P6" draw:layer="layout" svg:width="17.999cm" svg:height="0.636cm" svg:x="1.5cm" svg:y="7.697cm" svg:viewBox="0 0 18000 637" draw:points="0,0 18000,0 18000,637 0,637">
          <text:p/>
        </draw:polygon>
        <draw:frame draw:style-name="gr2" draw:text-style-name="P3" draw:layer="layout" svg:width="7.64cm" svg:height="0.746cm" svg:x="1.712cm" svg:y="6.589cm">
          <draw:text-box>
            <text:p text:style-name="P1"><text:span text:style-name="T5">7. </text:span><text:span text:style-name="T5">定制服务 </text:span><text:span text:style-name="T5">/ Customization</text:span></text:p>
          </draw:text-box>
        </draw:frame>
        <draw:frame draw:style-name="gr6" draw:text-style-name="P7" draw:layer="layout" svg:width="1.423cm" svg:height="0.399cm" svg:x="4.43cm" svg:y="7.786cm">
          <draw:text-box>
            <text:p text:style-name="P1"><text:span text:style-name="T6">项目 </text:span><text:span text:style-name="T6">Item</text:span></text:p>
          </draw:text-box>
        </draw:frame>
        <draw:frame draw:style-name="gr6" draw:text-style-name="P7" draw:layer="layout" svg:width="2.415cm" svg:height="0.399cm" svg:x="12.936cm" svg:y="7.78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314cm" svg:height="0.378cm" svg:x="3.987cm" svg:y="8.422cm">
          <draw:text-box>
            <text:p text:style-name="P1"><text:span text:style-name="T7">尺寸 </text:span><text:span text:style-name="T7">Dimensions</text:span></text:p>
          </draw:text-box>
        </draw:frame>
        <draw:frame draw:style-name="gr7" draw:text-style-name="P8" draw:layer="layout" svg:width="1.42cm" svg:height="0.378cm" svg:x="13.394cm" svg:y="8.422cm">
          <draw:text-box>
            <text:p text:style-name="P1"><text:span text:style-name="T7">可定制尺寸</text:span></text:p>
          </draw:text-box>
        </draw:frame>
        <draw:frame draw:style-name="gr7" draw:text-style-name="P8" draw:layer="layout" svg:width="2.125cm" svg:height="0.378cm" svg:x="4.081cm" svg:y="9.022cm">
          <draw:text-box>
            <text:p text:style-name="P1"><text:span text:style-name="T7">包装 </text:span><text:span text:style-name="T7">Packaging</text:span></text:p>
          </draw:text-box>
        </draw:frame>
        <draw:frame draw:style-name="gr7" draw:text-style-name="P8" draw:layer="layout" svg:width="2.555cm" svg:height="0.378cm" svg:x="12.83cm" svg:y="9.022cm">
          <draw:text-box>
            <text:p text:style-name="P1"><text:span text:style-name="T7">定制包装数量和方式</text:span></text:p>
          </draw:text-box>
        </draw:frame>
        <draw:frame draw:style-name="gr7" draw:text-style-name="P8" draw:layer="layout" svg:width="1.463cm" svg:height="0.378cm" svg:x="4.41cm" svg:y="9.622cm">
          <draw:text-box>
            <text:p text:style-name="P1"><text:span text:style-name="T7">LOGO</text:span><text:span text:style-name="T7">印刷</text:span></text:p>
          </draw:text-box>
        </draw:frame>
        <draw:frame draw:style-name="gr7" draw:text-style-name="P8" draw:layer="layout" svg:width="3.165cm" svg:height="0.378cm" svg:x="12.564cm" svg:y="9.622cm">
          <draw:text-box>
            <text:p text:style-name="P1"><text:span text:style-name="T7">包装袋上印刷品牌</text:span><text:span text:style-name="T7">LOGO</text:span></text:p>
          </draw:text-box>
        </draw:frame>
        <draw:frame draw:style-name="gr7" draw:text-style-name="P8" draw:layer="layout" svg:width="2.929cm" svg:height="0.378cm" svg:x="3.681cm" svg:y="10.221cm">
          <draw:text-box>
            <text:p text:style-name="P1"><text:span text:style-name="T7">切割方式 </text:span><text:span text:style-name="T7">Cut Method</text:span></text:p>
          </draw:text-box>
        </draw:frame>
        <draw:line draw:style-name="gr8" draw:text-style-name="P4" draw:layer="layout" svg:x1="1.5cm" svg:y1="7.697cm" svg:x2="19.499cm" svg:y2="7.697cm">
          <text:p/>
        </draw:line>
        <draw:line draw:style-name="gr8" draw:text-style-name="P4" draw:layer="layout" svg:x1="1.5cm" svg:y1="10.731cm" svg:x2="19.499cm" svg:y2="10.731cm">
          <text:p/>
        </draw:line>
        <draw:line draw:style-name="gr8" draw:text-style-name="P4" draw:layer="layout" svg:x1="1.5cm" svg:y1="10.731cm" svg:x2="1.5cm" svg:y2="7.697cm">
          <text:p/>
        </draw:line>
        <draw:line draw:style-name="gr8" draw:text-style-name="P4" draw:layer="layout" svg:x1="19.499cm" svg:y1="10.731cm" svg:x2="19.499cm" svg:y2="7.697cm">
          <text:p/>
        </draw:line>
        <draw:line draw:style-name="gr8" draw:text-style-name="P4" draw:layer="layout" svg:x1="1.5cm" svg:y1="8.332cm" svg:x2="19.499cm" svg:y2="8.332cm">
          <text:p/>
        </draw:line>
        <draw:line draw:style-name="gr8" draw:text-style-name="P4" draw:layer="layout" svg:x1="1.5cm" svg:y1="8.932cm" svg:x2="19.499cm" svg:y2="8.932cm">
          <text:p/>
        </draw:line>
        <draw:line draw:style-name="gr8" draw:text-style-name="P4" draw:layer="layout" svg:x1="1.5cm" svg:y1="9.532cm" svg:x2="19.499cm" svg:y2="9.532cm">
          <text:p/>
        </draw:line>
        <draw:line draw:style-name="gr8" draw:text-style-name="P4" draw:layer="layout" svg:x1="1.5cm" svg:y1="10.131cm" svg:x2="19.499cm" svg:y2="10.131cm">
          <text:p/>
        </draw:line>
        <draw:line draw:style-name="gr8" draw:text-style-name="P4" draw:layer="layout" svg:x1="8.7cm" svg:y1="10.731cm" svg:x2="8.7cm" svg:y2="7.697cm">
          <text:p/>
        </draw:line>
        <draw:frame draw:style-name="gr7" draw:text-style-name="P8" draw:layer="layout" svg:width="2.529cm" svg:height="0.378cm" svg:x="12.992cm" svg:y="10.221cm">
          <draw:text-box>
            <text:p text:style-name="P1"><text:span text:style-name="T7">激光</text:span><text:span text:style-name="T7">/</text:span><text:span text:style-name="T7">超声波</text:span><text:span text:style-name="T7">/</text:span><text:span text:style-name="T7">冷切</text:span></text:p>
          </draw:text-box>
        </draw:frame>
        <draw:polygon draw:style-name="gr5" draw:text-style-name="P6" draw:layer="layout" svg:width="17.999cm" svg:height="0.636cm" svg:x="1.5cm" svg:y="12.607cm" svg:viewBox="0 0 18000 637" draw:points="0,0 18000,0 18000,637 0,637">
          <text:p/>
        </draw:polygon>
        <draw:frame draw:style-name="gr2" draw:text-style-name="P3" draw:layer="layout" svg:width="7.856cm" svg:height="0.746cm" svg:x="1.712cm" svg:y="11.499cm">
          <draw:text-box>
            <text:p text:style-name="P1"><text:span text:style-name="T5">8. </text:span><text:span text:style-name="T5">认证与质量 </text:span><text:span text:style-name="T5">/ Certifications</text:span></text:p>
          </draw:text-box>
        </draw:frame>
        <draw:frame draw:style-name="gr6" draw:text-style-name="P7" draw:layer="layout" svg:width="0.603cm" svg:height="0.399cm" svg:x="3.45cm" svg:y="12.696cm">
          <draw:text-box>
            <text:p text:style-name="P1"><text:span text:style-name="T6">认证</text:span></text:p>
          </draw:text-box>
        </draw:frame>
        <draw:frame draw:style-name="gr6" draw:text-style-name="P7" draw:layer="layout" svg:width="0.603cm" svg:height="0.399cm" svg:x="7.95cm" svg:y="12.696cm">
          <draw:text-box>
            <text:p text:style-name="P1"><text:span text:style-name="T6">状态</text:span></text:p>
          </draw:text-box>
        </draw:frame>
        <draw:frame draw:style-name="gr6" draw:text-style-name="P7" draw:layer="layout" svg:width="0.603cm" svg:height="0.399cm" svg:x="14.7cm" svg:y="12.696cm">
          <draw:text-box>
            <text:p text:style-name="P1"><text:span text:style-name="T6">备注</text:span></text:p>
          </draw:text-box>
        </draw:frame>
        <draw:frame draw:style-name="gr7" draw:text-style-name="P8" draw:layer="layout" svg:width="0.48cm" svg:height="0.378cm" svg:x="3.512cm" svg:y="13.332cm">
          <draw:text-box>
            <text:p text:style-name="P1"><text:span text:style-name="T7">ISO</text:span></text:p>
          </draw:text-box>
        </draw:frame>
        <draw:frame draw:style-name="gr7" draw:text-style-name="P8" draw:layer="layout" svg:width="0.853cm" svg:height="0.378cm" svg:x="7.827cm" svg:y="13.3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1.704cm" svg:height="0.378cm" svg:x="14.153cm" svg:y="13.332cm">
          <draw:text-box>
            <text:p text:style-name="P1"><text:span text:style-name="T7">待与工厂确认</text:span></text:p>
          </draw:text-box>
        </draw:frame>
        <draw:frame draw:style-name="gr7" draw:text-style-name="P8" draw:layer="layout" svg:width="0.54cm" svg:height="0.378cm" svg:x="3.482cm" svg:y="13.932cm">
          <draw:text-box>
            <text:p text:style-name="P1"><text:span text:style-name="T7">SGS</text:span></text:p>
          </draw:text-box>
        </draw:frame>
        <draw:frame draw:style-name="gr7" draw:text-style-name="P8" draw:layer="layout" svg:width="0.853cm" svg:height="0.378cm" svg:x="7.827cm" svg:y="13.9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2.271cm" svg:height="0.378cm" svg:x="13.871cm" svg:y="13.932cm">
          <draw:text-box>
            <text:p text:style-name="P1"><text:span text:style-name="T7">可提供第三方检测</text:span></text:p>
          </draw:text-box>
        </draw:frame>
        <draw:frame draw:style-name="gr7" draw:text-style-name="P8" draw:layer="layout" svg:width="0.751cm" svg:height="0.378cm" svg:x="3.378cm" svg:y="14.532cm">
          <draw:text-box>
            <text:p text:style-name="P1"><text:span text:style-name="T7">RoHS</text:span></text:p>
          </draw:text-box>
        </draw:frame>
        <draw:frame draw:style-name="gr7" draw:text-style-name="P8" draw:layer="layout" svg:width="0.853cm" svg:height="0.378cm" svg:x="7.827cm" svg:y="14.532cm">
          <draw:text-box>
            <text:p text:style-name="P1"><text:span text:style-name="T7">待确认</text:span></text:p>
          </draw:text-box>
        </draw:frame>
        <draw:line draw:style-name="gr8" draw:text-style-name="P4" draw:layer="layout" svg:x1="1.5cm" svg:y1="12.607cm" svg:x2="19.499cm" svg:y2="12.607cm">
          <text:p/>
        </draw:line>
        <draw:line draw:style-name="gr8" draw:text-style-name="P4" draw:layer="layout" svg:x1="1.5cm" svg:y1="15.041cm" svg:x2="19.499cm" svg:y2="15.041cm">
          <text:p/>
        </draw:line>
        <draw:line draw:style-name="gr8" draw:text-style-name="P4" draw:layer="layout" svg:x1="1.5cm" svg:y1="15.041cm" svg:x2="1.5cm" svg:y2="12.607cm">
          <text:p/>
        </draw:line>
        <draw:line draw:style-name="gr8" draw:text-style-name="P4" draw:layer="layout" svg:x1="19.499cm" svg:y1="15.041cm" svg:x2="19.499cm" svg:y2="12.607cm">
          <text:p/>
        </draw:line>
        <draw:line draw:style-name="gr8" draw:text-style-name="P4" draw:layer="layout" svg:x1="1.5cm" svg:y1="13.242cm" svg:x2="19.499cm" svg:y2="13.242cm">
          <text:p/>
        </draw:line>
        <draw:line draw:style-name="gr8" draw:text-style-name="P4" draw:layer="layout" svg:x1="1.5cm" svg:y1="13.842cm" svg:x2="19.499cm" svg:y2="13.842cm">
          <text:p/>
        </draw:line>
        <draw:line draw:style-name="gr8" draw:text-style-name="P4" draw:layer="layout" svg:x1="1.5cm" svg:y1="14.442cm" svg:x2="19.499cm" svg:y2="14.442cm">
          <text:p/>
        </draw:line>
        <draw:line draw:style-name="gr8" draw:text-style-name="P4" draw:layer="layout" svg:x1="6cm" svg:y1="15.041cm" svg:x2="6cm" svg:y2="12.607cm">
          <text:p/>
        </draw:line>
        <draw:line draw:style-name="gr8" draw:text-style-name="P4" draw:layer="layout" svg:x1="10.499cm" svg:y1="15.041cm" svg:x2="10.499cm" svg:y2="12.607cm">
          <text:p/>
        </draw:line>
        <draw:frame draw:style-name="gr7" draw:text-style-name="P8" draw:layer="layout" svg:width="1.704cm" svg:height="0.378cm" svg:x="14.153cm" svg:y="14.532cm">
          <draw:text-box>
            <text:p text:style-name="P1"><text:span text:style-name="T7">建议出口欧盟</text:span></text:p>
          </draw:text-box>
        </draw:frame>
        <draw:frame draw:style-name="gr10" draw:text-style-name="P10" draw:layer="layout" svg:width="1.908cm" svg:height="0.56cm" svg:x="1.712cm" svg:y="15.617cm">
          <draw:text-box>
            <text:p text:style-name="P1"><text:span text:style-name="T8">产品优势</text:span><text:span text:style-name="T8">:</text:span></text:p>
          </draw:text-box>
        </draw:frame>
        <draw:frame draw:style-name="gr4" draw:text-style-name="P5" draw:layer="layout" svg:width="5.352cm" svg:height="0.446cm" svg:x="1.712cm" svg:y="16.422cm">
          <draw:text-box>
            <text:p text:style-name="P1"><text:span text:style-name="T4">- </text:span><text:span text:style-name="T4">工厂直供价格，目标市场竞争力强</text:span></text:p>
          </draw:text-box>
        </draw:frame>
        <draw:frame draw:style-name="gr4" draw:text-style-name="P5" draw:layer="layout" svg:width="4.348cm" svg:height="0.446cm" svg:x="1.712cm" svg:y="17.066cm">
          <draw:text-box>
            <text:p text:style-name="P1"><text:span text:style-name="T4">- </text:span><text:span text:style-name="T4">双面针织结构，低微尘排放</text:span></text:p>
          </draw:text-box>
        </draw:frame>
        <draw:frame draw:style-name="gr4" draw:text-style-name="P5" draw:layer="layout" svg:width="4.014cm" svg:height="0.446cm" svg:x="1.712cm" svg:y="17.71cm">
          <draw:text-box>
            <text:p text:style-name="P1"><text:span text:style-name="T4">- </text:span><text:span text:style-name="T4">激光封边，减少纤维脱落</text:span></text:p>
          </draw:text-box>
        </draw:frame>
        <draw:frame draw:style-name="gr4" draw:text-style-name="P5" draw:layer="layout" svg:width="5.068cm" svg:height="0.446cm" svg:x="1.712cm" svg:y="18.354cm">
          <draw:text-box>
            <text:p text:style-name="P1"><text:span text:style-name="T4">- </text:span><text:span text:style-name="T4">灵活定制：尺寸、包装、</text:span><text:span text:style-name="T4">LOGO</text:span></text:p>
          </draw:text-box>
        </draw:frame>
      </draw:page>
      <draw:page draw:name="page8" draw:style-name="dp1" draw:master-page-name="master-page70">
        <draw:frame draw:style-name="gr2" draw:text-style-name="P3" draw:layer="layout" svg:width="9.203cm" svg:height="0.746cm" svg:x="1.712cm" svg:y="1.679cm">
          <draw:text-box>
            <text:p text:style-name="P1"><text:span text:style-name="T5">9. </text:span><text:span text:style-name="T5">联系方式 </text:span><text:span text:style-name="T5">/ Contact Information</text:span></text:p>
          </draw:text-box>
        </draw:frame>
        <draw:frame draw:style-name="gr10" draw:text-style-name="P10" draw:layer="layout" svg:width="5.505cm" svg:height="0.56cm" svg:x="1.7cm" svg:y="2.85cm">
          <draw:text-box>
            <text:p text:style-name="P1"><text:span text:style-name="T8">深圳源洁无尘布产品有限公司</text:span></text:p>
          </draw:text-box>
        </draw:frame>
        <draw:frame draw:style-name="gr11" draw:text-style-name="P12" draw:layer="layout" svg:width="9cm" svg:height="1.25cm" svg:x="1.7cm" svg:y="3.6cm">
          <draw:text-box>
            <text:p text:style-name="P11"><text:span text:style-name="T8"><text:s text:c="2"/>Shenzhen <text:s text:c="2"/>Yuanjie Cleanroom Products</text:span></text:p>
          </draw:text-box>
        </draw:frame>
        <draw:frame draw:style-name="gr4" draw:text-style-name="P5" draw:layer="layout" svg:width="1.51cm" svg:height="0.446cm" svg:x="1.7cm" svg:y="4.654cm">
          <draw:text-box>
            <text:p text:style-name="P1"><text:span text:style-name="T4">联系信息</text:span><text:span text:style-name="T4">:</text:span></text:p>
          </draw:text-box>
        </draw:frame>
        <draw:frame draw:style-name="gr4" draw:text-style-name="P5" draw:layer="layout" svg:width="6.418cm" svg:height="0.446cm" svg:x="1.532cm" svg:y="5.404cm">
          <draw:text-box>
            <text:p text:style-name="P1"><text:span text:style-name="T4">地址</text:span><text:span text:style-name="T4">/Address: [_</text:span><text:span text:style-name="T4">中国广东省深圳龙华区</text:span><text:span text:style-name="T4">_]</text:span></text:p>
          </draw:text-box>
        </draw:frame>
        <draw:frame draw:style-name="gr12" draw:text-style-name="P13" draw:layer="layout" svg:width="5.734cm" svg:height="0.75cm" svg:x="1.7cm" svg:y="6.1cm">
          <draw:text-box>
            <text:p text:style-name="P1"><text:span text:style-name="T4">电话</text:span><text:span text:style-name="T4">/Phone: [__+8613714185883__]</text:span></text:p>
          </draw:text-box>
        </draw:frame>
        <draw:frame draw:style-name="gr4" draw:text-style-name="P5" draw:layer="layout" svg:width="5.957cm" svg:height="0.446cm" svg:x="1.743cm" svg:y="6.904cm">
          <draw:text-box>
            <text:p text:style-name="P1"><text:span text:style-name="T4">邮箱</text:span><text:span text:style-name="T4">/Email: [__cmdcsz@gmail.com__]</text:span></text:p>
          </draw:text-box>
        </draw:frame>
        <draw:frame draw:style-name="gr4" draw:text-style-name="P5" draw:layer="layout" svg:width="10.391cm" svg:height="0.446cm" svg:x="1.7cm" svg:y="7.6cm">
          <draw:text-box>
            <text:p text:style-name="P1"><text:span text:style-name="T4">网站</text:span><text:span text:style-name="T4">/Website: https://cmdcsz-collab.github.io/cleanroom-wiper/</text:span></text:p>
          </draw:text-box>
        </draw:frame>
        <draw:frame draw:style-name="gr4" draw:text-style-name="P5" draw:layer="layout" svg:width="5.475cm" svg:height="0.446cm" svg:x="1.725cm" svg:y="8.35cm">
          <draw:text-box>
            <text:p text:style-name="P1"><text:span text:style-name="T4">WhatsApp: [__+8613714185883__]</text:span></text:p>
          </draw:text-box>
        </draw:frame>
        <draw:frame draw:style-name="gr10" draw:text-style-name="P10" draw:layer="layout" svg:width="5.304cm" svg:height="0.56cm" svg:x="1.7cm" svg:y="9.1cm">
          <draw:text-box>
            <text:p text:style-name="P1"><text:span text:style-name="T8">目标市场 </text:span><text:span text:style-name="T8">/ Target Markets</text:span></text:p>
          </draw:text-box>
        </draw:frame>
        <draw:frame draw:style-name="gr13" draw:text-style-name="P13" draw:layer="layout" svg:width="5.061cm" svg:height="0.516cm" svg:x="1.95cm" svg:y="10.1cm">
          <draw:text-box>
            <text:p text:style-name="P1"><text:span text:style-name="T4">- </text:span><text:span text:style-name="T4">土耳其</text:span><text:span text:style-name="T4">: DS</text:span><text:span text:style-name="T4">系列 </text:span><text:span text:style-name="T4">6x6, 9x9</text:span><text:span text:style-name="T4">英寸</text:span></text:p>
          </draw:text-box>
        </draw:frame>
        <draw:frame draw:style-name="gr14" draw:text-style-name="P13" draw:layer="layout" svg:width="7.122cm" svg:height="0.516cm" svg:x="1.95cm" svg:y="10.846cm">
          <draw:text-box>
            <text:p text:style-name="P1"><text:span text:style-name="T4">- </text:span><text:span text:style-name="T4">中东</text:span><text:span text:style-name="T4">(</text:span><text:span text:style-name="T4">阿联酋</text:span><text:span text:style-name="T4">/</text:span><text:span text:style-name="T4">沙特</text:span><text:span text:style-name="T4">): DS</text:span><text:span text:style-name="T4">系列 </text:span><text:span text:style-name="T4">6x6, 9x9</text:span><text:span text:style-name="T4">英寸</text:span></text:p>
          </draw:text-box>
        </draw:frame>
        <draw:frame draw:style-name="gr15" draw:text-style-name="P13" draw:layer="layout" svg:width="5.456cm" svg:height="0.517cm" svg:x="1.95cm" svg:y="11.592cm">
          <draw:text-box>
            <text:p text:style-name="P1"><text:span text:style-name="T4">- </text:span><text:span text:style-name="T4">东欧</text:span><text:span text:style-name="T4">(</text:span><text:span text:style-name="T4">波兰</text:span><text:span text:style-name="T4">/</text:span><text:span text:style-name="T4">捷克</text:span><text:span text:style-name="T4">): DS + KH</text:span><text:span text:style-name="T4">系列</text:span></text:p>
          </draw:text-box>
        </draw:frame>
        <draw:frame draw:style-name="gr16" draw:text-style-name="P13" draw:layer="layout" svg:width="5.831cm" svg:height="0.517cm" svg:x="1.95cm" svg:y="12.338cm">
          <draw:text-box>
            <text:p text:style-name="P1"><text:span text:style-name="T4">- </text:span><text:span text:style-name="T4">俄罗斯</text:span><text:span text:style-name="T4">/</text:span><text:span text:style-name="T4">独联体</text:span><text:span text:style-name="T4">: KH</text:span><text:span text:style-name="T4">系列工业擦拭布</text:span></text:p>
          </draw:text-box>
        </draw:frame>
        <draw:frame draw:style-name="gr17" draw:text-style-name="P13" draw:layer="layout" svg:width="3.368cm" svg:height="0.516cm" svg:x="1.95cm" svg:y="13.084cm">
          <draw:text-box>
            <text:p text:style-name="P1"><text:span text:style-name="T4">- </text:span><text:span text:style-name="T4">其他市场</text:span><text:span text:style-name="T4">: </text:span><text:span text:style-name="T4">欢迎垂询</text:span></text:p>
          </draw:text-box>
        </draw:frame>
        <draw:frame draw:style-name="gr7" draw:text-style-name="P8" draw:layer="layout" svg:width="5.112cm" svg:height="0.378cm" svg:x="7.95cm" svg:y="14.222cm">
          <draw:text-box>
            <text:p text:style-name="P1"><text:span text:style-name="T9">* </text:span><text:span text:style-name="T9">所有规格仅供参考，以实际产品为准。</text:span></text:p>
          </draw:text-box>
        </draw:frame>
        <draw:frame draw:style-name="gr7" draw:text-style-name="P8" draw:layer="layout" svg:width="4.738cm" svg:height="0.378cm" svg:x="8.125cm" svg:y="16.091cm">
          <draw:text-box>
            <text:p text:style-name="P1"><text:span text:style-name="T9">Version V2.0 | Created: 2026-07-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15T20:24:19.798046000</dc:date>
    <meta:editing-duration>PT13M53S</meta:editing-duration>
    <meta:editing-cycles>1</meta:editing-cycles>
    <meta:document-statistic meta:object-count="208"/>
    <meta:generator>LibreOffice/26.2.4.2$Windows_X86_64 LibreOffice_project/0229ac93fcf0d7cbc6376066c6f35021cef002dc</meta:generator>
  </office:meta>
</office:document-meta>
</file>