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B000001F4741F59A7.png" manifest:media-type="image/png"/>
  <manifest:file-entry manifest:full-path="Pictures/1000000000000320000003200DFCA8F2.png" manifest:media-type="image/png"/>
  <manifest:file-entry manifest:full-path="Pictures/10000000000004FF0000050F734ABC2C.png" manifest:media-type="image/png"/>
  <manifest:file-entry manifest:full-path="Pictures/10000000000002EE000001F4D76271C2.png" manifest:media-type="image/png"/>
  <manifest:file-entry manifest:full-path="Pictures/100000000000029B000001F4C4699DDB.png" manifest:media-type="image/png"/>
  <manifest:file-entry manifest:full-path="Pictures/10000000000003200000032092A550C8.png" manifest:media-type="image/png"/>
  <manifest:file-entry manifest:full-path="Pictures/1000000000000328000001F4458B9864.png" manifest:media-type="image/png"/>
  <manifest:file-entry manifest:full-path="Pictures/10000000000002EE000001F4E8783B27.png" manifest:media-type="image/png"/>
  <manifest:file-entry manifest:full-path="Pictures/100000000000025A000002FD61CE54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16.37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2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10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68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08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86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8.23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7.39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6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7.03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7.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9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8.86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1.0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4.65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3.45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8.02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14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70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7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7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1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6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5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3.4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62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03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8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5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17cm" svg:stroke-color="#000ccc" draw:stroke-linejoin="round" svg:stroke-linecap="round" draw:fill="none" fo:padding-top="0.008cm" fo:padding-bottom="0.008cm" fo:padding-left="0.008cm" fo:padding-right="0.008cm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83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2b5a8c" loext:decorative="false"/>
    </style:style>
    <style:style style:name="gr42" style:family="graphic" style:parent-style-name="standard">
      <style:graphic-properties draw:stroke="none" draw:fill="solid" draw:fill-color="#1a3a5c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8.84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6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1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9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3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1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8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2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2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7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6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2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1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2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5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6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6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2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2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85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5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0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5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90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35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34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01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06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9.20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0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5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41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73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957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0.39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475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30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061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7.12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456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831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3.36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11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73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none"/>
      <style:text-properties fo:font-size="8.5pt" style:font-size-asian="8.5pt" style:font-size-complex="8.5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solid" draw:fill-color="#2b5a8c"/>
    </style:style>
    <style:style style:name="P9" style:family="paragraph">
      <loext:graphic-properties draw:fill="solid" draw:fill-color="#1a3a5c"/>
    </style:style>
    <style:style style:name="P10" style:family="paragraph">
      <style:paragraph-properties fo:text-align="start" style:writing-mode="lr-tb"/>
      <style:text-properties fo:font-size="16pt"/>
    </style:style>
    <style:style style:name="P1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 style:writing-mode="lr-tb"/>
      <style:text-properties fo:font-size="8.5pt"/>
    </style:style>
    <style:style style:name="P13" style:family="paragraph">
      <loext:graphic-properties draw:fill="none"/>
      <style:paragraph-properties fo:text-align="start"/>
      <style:text-properties fo:font-size="8.5pt" style:font-size-asian="8.5pt" style:font-size-complex="8.5pt"/>
    </style:style>
    <style:style style:name="P14" style:family="paragraph">
      <style:paragraph-properties fo:text-align="start" style:writing-mode="lr-tb"/>
      <style:text-properties fo:font-size="8pt"/>
    </style:style>
    <style:style style:name="P15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6" style:family="paragraph">
      <style:paragraph-properties fo:text-align="start" style:writing-mode="lr-tb"/>
      <style:text-properties style:font-size-asian="8pt"/>
    </style:style>
    <style:style style:name="P17" style:family="paragraph">
      <style:paragraph-properties fo:text-align="start" style:writing-mode="lr-tb"/>
      <style:text-properties style:font-size-asian="8.5pt"/>
    </style:style>
    <style:style style:name="P18" style:family="paragraph">
      <style:paragraph-properties fo:text-align="start" style:writing-mode="lr-tb"/>
      <style:text-properties fo:font-size="12pt"/>
    </style:style>
    <style:style style:name="P1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text-align="start" style:writing-mode="lr-tb"/>
      <style:text-properties fo:font-size="9.5pt"/>
    </style:style>
    <style:style style:name="P21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P22" style:family="paragraph">
      <style:paragraph-properties fo:text-align="start" style:writing-mode="lr-tb"/>
      <style:text-properties style:font-size-asian="12pt"/>
    </style:style>
    <style:style style:name="P23" style:family="paragraph">
      <style:paragraph-properties fo:margin-top="0.42cm" fo:margin-bottom="0.35cm" fo:text-align="start" style:writing-mode="lr-tb"/>
      <style:text-properties fo:font-size="10pt"/>
    </style:style>
    <style:style style:name="P2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T1" style:family="text">
      <style:text-properties fo:color="#1a3a5c" loext:opacity="100%" style:font-name="Microsoft YaHei" fo:font-size="22pt" fo:font-weight="normal" style:font-name-asian="Microsoft YaHei" style:font-size-asian="22pt" style:font-weight-asian="normal" style:font-name-complex="Microsoft YaHei" style:font-size-complex="22pt" style:font-weight-complex="normal"/>
    </style:style>
    <style:style style:name="T2" style:family="text">
      <style:text-properties fo:color="#000555" loext:opacity="100%" style:font-name="ZapfDingbats" fo:font-size="16pt" fo:font-weight="normal" style:font-name-asian="ZapfDingbats" style:font-size-asian="16pt" style:font-weight-asian="normal" style:font-name-complex="ZapfDingbats" style:font-size-complex="16pt" style:font-weight-complex="normal"/>
    </style:style>
    <style:style style:name="T3" style:family="text">
      <style:text-properties fo:color="#000555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4" style:family="text">
      <style:text-properties fo:color="#000333" loext:opacity="100%" style:font-name="Microsoft YaHei" fo:font-size="9.5pt" fo:font-weight="normal" style:font-name-asian="Microsoft YaHei" style:font-size-asian="9.5pt" style:font-weight-asian="normal" style:font-name-complex="Microsoft YaHei" style:font-size-complex="9.5pt" style:font-weight-complex="normal"/>
    </style:style>
    <style:style style:name="T5" style:family="text">
      <style:text-properties fo:color="#1a3a5c" loext:opacity="100%" style:font-name="Microsoft YaHei" fo:font-size="16pt" fo:font-weight="normal" style:font-name-asian="Microsoft YaHei" style:font-size-asian="16pt" style:font-weight-asian="normal" style:font-name-complex="Microsoft YaHei" style:font-size-complex="16pt" style:font-weight-complex="normal"/>
    </style:style>
    <style:style style:name="T6" style:family="text">
      <style:text-properties fo:color="#ffffff" loext:opacity="100%" style:font-name="Microsoft YaHei" fo:font-size="8.5pt" fo:font-weight="normal" style:font-name-asian="Microsoft YaHei" style:font-size-asian="8.5pt" style:font-weight-asian="normal" style:font-name-complex="Microsoft YaHei" style:font-size-complex="8.5pt" style:font-weight-complex="normal"/>
    </style:style>
    <style:style style:name="T7" style:family="text">
      <style:text-properties fo:color="#000333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style:style style:name="T8" style:family="text">
      <style:text-properties fo:color="#2b5a8c" loext:opacity="100%" style:font-name="Microsoft YaHei" fo:font-size="12pt" fo:font-weight="normal" style:font-name-asian="Microsoft YaHei" style:font-size-asian="12pt" style:font-weight-asian="normal" style:font-name-complex="Microsoft YaHei" style:font-size-complex="12pt" style:font-weight-complex="normal"/>
    </style:style>
    <style:style style:name="T9" style:family="text">
      <style:text-properties fo:color="#000888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371cm" svg:height="1.025cm" svg:x="2.301cm" svg:y="3.667cm">
          <draw:text-box>
            <text:p text:style-name="P1"><text:span text:style-name="T1">Clean</text:span><text:span text:style-name="T1">room </text:span><text:span text:style-name="T1">Wiper </text:span><text:span text:style-name="T1">&amp; </text:span><text:span text:style-name="T1">Indus</text:span><text:span text:style-name="T1">trial </text:span><text:span text:style-name="T1">Wipe </text:span><text:span text:style-name="T1">Catal</text:span><text:span text:style-name="T1">og</text:span></text:p>
          </draw:text-box>
        </draw:frame>
        <draw:frame draw:style-name="gr2" draw:text-style-name="P3" draw:layer="layout" svg:width="1.265cm" svg:height="0.563cm" svg:x="7.499cm" svg:y="5.343cm">
          <draw:text-box>
            <text:p text:style-name="P1"><text:span text:style-name="T2">■■</text:span><text:span text:style-name="T2">■</text:span></text:p>
          </draw:text-box>
        </draw:frame>
        <draw:frame draw:style-name="gr3" draw:text-style-name="P3" draw:layer="layout" svg:width="0.69cm" svg:height="0.628cm" svg:x="8.788cm" svg:y="5.224cm">
          <draw:text-box>
            <text:p text:style-name="P1"><text:span text:style-name="T3"><text:s/>&amp; </text:span></text:p>
          </draw:text-box>
        </draw:frame>
        <draw:frame draw:style-name="gr4" draw:text-style-name="P3" draw:layer="layout" svg:width="2.107cm" svg:height="0.563cm" svg:x="9.478cm" svg:y="5.343cm">
          <draw:text-box>
            <text:p text:style-name="P1"><text:span text:style-name="T2">■■■■</text:span><text:span text:style-name="T2">■</text:span></text:p>
          </draw:text-box>
        </draw:frame>
        <draw:frame draw:style-name="gr5" draw:text-style-name="P3" draw:layer="layout" svg:width="0.563cm" svg:height="0.628cm" svg:x="11.626cm" svg:y="5.22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10.999cm" svg:height="10.999cm" svg:x="5cm" svg:y="7.546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7" draw:text-style-name="P3" draw:layer="layout" svg:width="1.686cm" svg:height="0.563cm" svg:x="11.783cm" svg:y="5.343cm">
          <draw:text-box>
            <text:p text:style-name="P1"><text:span text:style-name="T2">■</text:span><text:span text:style-name="T2">■</text:span><text:span text:style-name="T2">■</text:span><text:span text:style-name="T2">■</text:span></text:p>
          </draw:text-box>
        </draw:frame>
        <draw:frame draw:style-name="gr8" draw:text-style-name="P5" draw:layer="layout" svg:width="10.09cm" svg:height="0.446cm" svg:x="1.712cm" svg:y="20.027cm">
          <draw:text-box>
            <text:p text:style-name="P1"><text:span text:style-name="T4">供</text:span><text:span text:style-name="T4">应</text:span><text:span text:style-name="T4">商</text:span><text:span text:style-name="T4">: </text:span><text:span text:style-name="T4">深</text:span><text:span text:style-name="T4">圳</text:span><text:span text:style-name="T4">永</text:span><text:span text:style-name="T4">新</text:span><text:span text:style-name="T4">源</text:span><text:span text:style-name="T4">科</text:span><text:span text:style-name="T4">技</text:span><text:span text:style-name="T4">无</text:span><text:span text:style-name="T4">尘</text:span><text:span text:style-name="T4">布</text:span><text:span text:style-name="T4">（</text:span><text:span text:style-name="T4">Yua</text:span><text:span text:style-name="T4">njie </text:span><text:span text:style-name="T4">Cle</text:span><text:span text:style-name="T4">anr</text:span><text:span text:style-name="T4">oo</text:span><text:span text:style-name="T4">m </text:span><text:span text:style-name="T4">Pro</text:span><text:span text:style-name="T4">duc</text:span><text:span text:style-name="T4">ts</text:span><text:span text:style-name="T4">）</text:span></text:p>
          </draw:text-box>
        </draw:frame>
        <draw:frame draw:style-name="gr9" draw:text-style-name="P5" draw:layer="layout" svg:width="4.868cm" svg:height="0.446cm" svg:x="1.712cm" svg:y="20.671cm">
          <draw:text-box>
            <text:p text:style-name="P1"><text:span text:style-name="T4">版</text:span><text:span text:style-name="T4">本</text:span><text:span text:style-name="T4">: </text:span><text:span text:style-name="T4">V2.</text:span><text:span text:style-name="T4">0 | </text:span><text:span text:style-name="T4">日</text:span><text:span text:style-name="T4">期</text:span><text:span text:style-name="T4">: </text:span><text:span text:style-name="T4">202</text:span><text:span text:style-name="T4">6</text:span><text:span text:style-name="T4">年</text:span><text:span text:style-name="T4">7</text:span><text:span text:style-name="T4">月</text:span></text:p>
          </draw:text-box>
        </draw:frame>
      </draw:page>
      <draw:page draw:name="page2" draw:style-name="dp1" draw:master-page-name="master-page26">
        <draw:frame draw:style-name="gr10" draw:text-style-name="P3" draw:layer="layout" svg:width="8.234cm" svg:height="0.746cm" svg:x="1.712cm" svg:y="1.679cm">
          <draw:text-box>
            <text:p text:style-name="P1"><text:span text:style-name="T5">1. </text:span><text:span text:style-name="T5">公司简介 </text:span><text:span text:style-name="T5">/ </text:span><text:span text:style-name="T5">Company </text:span><text:span text:style-name="T5">Profile</text:span></text:p>
          </draw:text-box>
        </draw:frame>
        <draw:frame draw:style-name="gr11" draw:text-style-name="P5" draw:layer="layout" svg:width="18.396cm" svg:height="0.446cm" svg:x="1.712cm" svg:y="2.768cm">
          <draw:text-box>
            <text:p text:style-name="P1"><text:span text:style-name="T4">深</text:span><text:span text:style-name="T4">圳</text:span><text:span text:style-name="T4">永</text:span><text:span text:style-name="T4">新</text:span><text:span text:style-name="T4">源</text:span><text:span text:style-name="T4">科</text:span><text:span text:style-name="T4">技</text:span><text:span text:style-name="T4">无</text:span><text:span text:style-name="T4">尘</text:span><text:span text:style-name="T4">布</text:span><text:span text:style-name="T4">产</text:span><text:span text:style-name="T4">品</text:span><text:span text:style-name="T4">有</text:span><text:span text:style-name="T4">限</text:span><text:span text:style-name="T4">公</text:span><text:span text:style-name="T4">司</text:span><text:span text:style-name="T4">是</text:span><text:span text:style-name="T4">一</text:span><text:span text:style-name="T4">家</text:span><text:span text:style-name="T4">专</text:span><text:span text:style-name="T4">业</text:span><text:span text:style-name="T4">生</text:span><text:span text:style-name="T4">产</text:span><text:span text:style-name="T4">无</text:span><text:span text:style-name="T4">尘</text:span><text:span text:style-name="T4">布</text:span><text:span text:style-name="T4">和</text:span><text:span text:style-name="T4">工</text:span><text:span text:style-name="T4">业</text:span><text:span text:style-name="T4">擦</text:span><text:span text:style-name="T4">拭</text:span><text:span text:style-name="T4">布</text:span><text:span text:style-name="T4">的</text:span><text:span text:style-name="T4">制</text:span><text:span text:style-name="T4">造</text:span><text:span text:style-name="T4">商</text:span><text:span text:style-name="T4">，</text:span><text:span text:style-name="T4">位</text:span><text:span text:style-name="T4">于</text:span><text:span text:style-name="T4">中</text:span><text:span text:style-name="T4">国</text:span><text:span text:style-name="T4">江</text:span><text:span text:style-name="T4">苏</text:span><text:span text:style-name="T4">省</text:span><text:span text:style-name="T4">无</text:span><text:span text:style-name="T4">锡</text:span><text:span text:style-name="T4">市</text:span><text:span text:style-name="T4">。</text:span><text:span text:style-name="T4">我</text:span><text:span text:style-name="T4">们</text:span><text:span text:style-name="T4">为</text:span><text:span text:style-name="T4">电</text:span><text:span text:style-name="T4">子</text:span><text:span text:style-name="T4">、</text:span><text:span text:style-name="T4">半</text:span></text:p>
          </draw:text-box>
        </draw:frame>
        <draw:frame draw:style-name="gr12" draw:text-style-name="P5" draw:layer="layout" svg:width="7.694cm" svg:height="0.446cm" svg:x="1.712cm" svg:y="3.262cm">
          <draw:text-box>
            <text:p text:style-name="P1"><text:span text:style-name="T4">导</text:span><text:span text:style-name="T4">体</text:span><text:span text:style-name="T4">、</text:span><text:span text:style-name="T4">汽</text:span><text:span text:style-name="T4">车</text:span><text:span text:style-name="T4">和</text:span><text:span text:style-name="T4">制</text:span><text:span text:style-name="T4">药</text:span><text:span text:style-name="T4">行</text:span><text:span text:style-name="T4">业</text:span><text:span text:style-name="T4">提</text:span><text:span text:style-name="T4">供</text:span><text:span text:style-name="T4">高</text:span><text:span text:style-name="T4">品</text:span><text:span text:style-name="T4">质</text:span><text:span text:style-name="T4">的</text:span><text:span text:style-name="T4">清</text:span><text:span text:style-name="T4">洁</text:span><text:span text:style-name="T4">解</text:span><text:span text:style-name="T4">决</text:span><text:span text:style-name="T4">方</text:span><text:span text:style-name="T4">案</text:span><text:span text:style-name="T4">。</text:span></text:p>
          </draw:text-box>
        </draw:frame>
        <draw:frame draw:style-name="gr13" draw:text-style-name="P5" draw:layer="layout" svg:width="20.666cm" svg:height="0.446cm" svg:x="1.712cm" svg:y="3.906cm">
          <draw:text-box>
            <text:p text:style-name="P1"><text:span text:style-name="T4">She</text:span><text:span text:style-name="T4">nzh</text:span><text:span text:style-name="T4">en </text:span><text:span text:style-name="T4">Yo</text:span><text:span text:style-name="T4">ngx</text:span><text:span text:style-name="T4">iny</text:span><text:span text:style-name="T4">uan </text:span><text:span text:style-name="T4">Tec</text:span><text:span text:style-name="T4">hn</text:span><text:span text:style-name="T4">olo</text:span><text:span text:style-name="T4">gy </text:span><text:span text:style-name="T4">Cle</text:span><text:span text:style-name="T4">anr</text:span><text:span text:style-name="T4">oo</text:span><text:span text:style-name="T4">m </text:span><text:span text:style-name="T4">Pro</text:span><text:span text:style-name="T4">duc</text:span><text:span text:style-name="T4">ts </text:span><text:span text:style-name="T4">is a </text:span><text:span text:style-name="T4">pro</text:span><text:span text:style-name="T4">fes</text:span><text:span text:style-name="T4">sio</text:span><text:span text:style-name="T4">nal </text:span><text:span text:style-name="T4">ma</text:span><text:span text:style-name="T4">nuf</text:span><text:span text:style-name="T4">act</text:span><text:span text:style-name="T4">ure</text:span><text:span text:style-name="T4">r of </text:span><text:span text:style-name="T4">cle</text:span><text:span text:style-name="T4">anr</text:span><text:span text:style-name="T4">oo</text:span><text:span text:style-name="T4">m </text:span><text:span text:style-name="T4">wip</text:span><text:span text:style-name="T4">ers </text:span><text:span text:style-name="T4">an</text:span><text:span text:style-name="T4">d </text:span><text:span text:style-name="T4">ind</text:span><text:span text:style-name="T4">ust</text:span><text:span text:style-name="T4">rial </text:span><text:span text:style-name="T4">wip</text:span><text:span text:style-name="T4">es</text:span></text:p>
          </draw:text-box>
        </draw:frame>
        <draw:frame draw:style-name="gr14" draw:text-style-name="P5" draw:layer="layout" svg:width="17.25cm" svg:height="0.446cm" svg:x="1.712cm" svg:y="4.4cm">
          <draw:text-box>
            <text:p text:style-name="P1"><text:span text:style-name="T4">based in Wuxi, </text:span><text:span text:style-name="T4">Jiangsu, China. We </text:span><text:span text:style-name="T4">supply high-quality </text:span><text:span text:style-name="T4">cleaning solutions for </text:span><text:span text:style-name="T4">the electronics, </text:span><text:span text:style-name="T4">semiconductor,</text:span></text:p>
          </draw:text-box>
        </draw:frame>
        <draw:frame draw:style-name="gr6" draw:text-style-name="P4" draw:layer="layout" svg:width="5.431cm" svg:height="5.499cm" svg:x="1.784cm" svg:y="5.963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6" draw:text-style-name="P4" draw:layer="layout" svg:width="5.499cm" svg:height="5.499cm" svg:x="7.75cm" svg:y="5.963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6" draw:text-style-name="P4" draw:layer="layout" svg:width="5.499cm" svg:height="5.499cm" svg:x="13.75cm" svg:y="5.963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15" draw:text-style-name="P5" draw:layer="layout" svg:width="6.902cm" svg:height="0.446cm" svg:x="1.712cm" svg:y="4.894cm">
          <draw:text-box>
            <text:p text:style-name="P1"><text:span text:style-name="T4">automot</text:span><text:span text:style-name="T4">ive, and </text:span><text:span text:style-name="T4">pharmac</text:span><text:span text:style-name="T4">eutical </text:span><text:span text:style-name="T4">industrie</text:span><text:span text:style-name="T4">s.</text:span></text:p>
          </draw:text-box>
        </draw:frame>
      </draw:page>
      <draw:page draw:name="page3" draw:style-name="dp1" draw:master-page-name="master-page31">
        <draw:frame draw:style-name="gr16" draw:text-style-name="P3" draw:layer="layout" svg:width="8.869cm" svg:height="0.746cm" svg:x="1.712cm" svg:y="1.679cm">
          <draw:text-box>
            <text:p text:style-name="P1"><text:span text:style-name="T5">2. </text:span><text:span text:style-name="T5">生</text:span><text:span text:style-name="T5">产</text:span><text:span text:style-name="T5">现</text:span><text:span text:style-name="T5">场 </text:span><text:span text:style-name="T5">/ </text:span><text:span text:style-name="T5">Fa</text:span><text:span text:style-name="T5">ct</text:span><text:span text:style-name="T5">or</text:span><text:span text:style-name="T5">y </text:span><text:span text:style-name="T5">Pr</text:span><text:span text:style-name="T5">od</text:span><text:span text:style-name="T5">uc</text:span><text:span text:style-name="T5">tio</text:span><text:span text:style-name="T5">n</text:span></text:p>
          </draw:text-box>
        </draw:frame>
        <draw:frame draw:style-name="gr17" draw:text-style-name="P5" draw:layer="layout" svg:width="11.373cm" svg:height="0.446cm" svg:x="1.712cm" svg:y="2.768cm">
          <draw:text-box>
            <text:p text:style-name="P1"><text:span text:style-name="T4">以</text:span><text:span text:style-name="T4">下</text:span><text:span text:style-name="T4">是</text:span><text:span text:style-name="T4">永</text:span><text:span text:style-name="T4">新</text:span><text:span text:style-name="T4">源</text:span><text:span text:style-name="T4">工</text:span><text:span text:style-name="T4">厂</text:span><text:span text:style-name="T4">的</text:span><text:span text:style-name="T4">生</text:span><text:span text:style-name="T4">产</text:span><text:span text:style-name="T4">现</text:span><text:span text:style-name="T4">场</text:span><text:span text:style-name="T4">图</text:span><text:span text:style-name="T4">片</text:span><text:span text:style-name="T4">，</text:span><text:span text:style-name="T4">展</text:span><text:span text:style-name="T4">示</text:span><text:span text:style-name="T4">了</text:span><text:span text:style-name="T4">无</text:span><text:span text:style-name="T4">尘</text:span><text:span text:style-name="T4">布</text:span><text:span text:style-name="T4">的</text:span><text:span text:style-name="T4">生</text:span><text:span text:style-name="T4">产</text:span><text:span text:style-name="T4">、</text:span><text:span text:style-name="T4">切</text:span><text:span text:style-name="T4">割</text:span><text:span text:style-name="T4">和</text:span><text:span text:style-name="T4">包</text:span><text:span text:style-name="T4">装</text:span><text:span text:style-name="T4">流</text:span><text:span text:style-name="T4">程</text:span><text:span text:style-name="T4">。</text:span></text:p>
          </draw:text-box>
        </draw:frame>
        <draw:frame draw:style-name="gr6" draw:text-style-name="P4" draw:layer="layout" svg:width="10.503cm" svg:height="6.499cm" svg:x="0.748cm" svg:y="4.481cm">
          <draw:image xlink:href="Pictures/1000000000000328000001F4458B9864.png" xlink:type="simple" xlink:show="embed" xlink:actuate="onLoad" draw:mime-type="image/png">
            <text:p/>
          </draw:image>
        </draw:frame>
        <draw:frame draw:style-name="gr6" draw:text-style-name="P4" draw:layer="layout" svg:width="8.67cm" svg:height="6.499cm" svg:x="10.665cm" svg:y="4.481cm">
          <draw:image xlink:href="Pictures/100000000000029B000001F4C4699DDB.png" xlink:type="simple" xlink:show="embed" xlink:actuate="onLoad" draw:mime-type="image/png">
            <text:p/>
          </draw:image>
        </draw:frame>
        <draw:frame draw:style-name="gr6" draw:text-style-name="P4" draw:layer="layout" svg:width="8.67cm" svg:height="6.499cm" svg:x="1.665cm" svg:y="11.493cm">
          <draw:image xlink:href="Pictures/100000000000029B000001F4741F59A7.png" xlink:type="simple" xlink:show="embed" xlink:actuate="onLoad" draw:mime-type="image/png">
            <text:p/>
          </draw:image>
        </draw:frame>
        <draw:frame draw:style-name="gr6" draw:text-style-name="P4" draw:layer="layout" svg:width="9.749cm" svg:height="6.499cm" svg:x="10.125cm" svg:y="11.493cm">
          <draw:image xlink:href="Pictures/10000000000002EE000001F4D76271C2.png" xlink:type="simple" xlink:show="embed" xlink:actuate="onLoad" draw:mime-type="image/png">
            <text:p/>
          </draw:image>
        </draw:frame>
        <draw:frame draw:style-name="gr6" draw:text-style-name="P4" draw:layer="layout" svg:width="9.749cm" svg:height="6.499cm" svg:x="5.625cm" svg:y="18.399cm">
          <draw:image xlink:href="Pictures/10000000000002EE000001F4E8783B27.png" xlink:type="simple" xlink:show="embed" xlink:actuate="onLoad" draw:mime-type="image/png">
            <text:p/>
          </draw:image>
        </draw:frame>
        <draw:frame draw:style-name="gr18" draw:text-style-name="P5" draw:layer="layout" svg:width="15.562cm" svg:height="0.446cm" svg:x="1.712cm" svg:y="3.412cm">
          <draw:text-box>
            <text:p text:style-name="P1"><text:span text:style-name="T4">Be</text:span><text:span text:style-name="T4">lo</text:span><text:span text:style-name="T4">w </text:span><text:span text:style-name="T4">ar</text:span><text:span text:style-name="T4">e </text:span><text:span text:style-name="T4">pr</text:span><text:span text:style-name="T4">od</text:span><text:span text:style-name="T4">uc</text:span><text:span text:style-name="T4">tio</text:span><text:span text:style-name="T4">n </text:span><text:span text:style-name="T4">sit</text:span><text:span text:style-name="T4">e </text:span><text:span text:style-name="T4">ph</text:span><text:span text:style-name="T4">ot</text:span><text:span text:style-name="T4">os </text:span><text:span text:style-name="T4">fro</text:span><text:span text:style-name="T4">m </text:span><text:span text:style-name="T4">Yo</text:span><text:span text:style-name="T4">ng</text:span><text:span text:style-name="T4">xin</text:span><text:span text:style-name="T4">yu</text:span><text:span text:style-name="T4">an </text:span><text:span text:style-name="T4">fac</text:span><text:span text:style-name="T4">tor</text:span><text:span text:style-name="T4">y, </text:span><text:span text:style-name="T4">sh</text:span><text:span text:style-name="T4">o</text:span><text:span text:style-name="T4">wi</text:span><text:span text:style-name="T4">ng </text:span><text:span text:style-name="T4">th</text:span><text:span text:style-name="T4">e </text:span><text:span text:style-name="T4">m</text:span><text:span text:style-name="T4">an</text:span><text:span text:style-name="T4">uf</text:span><text:span text:style-name="T4">ac</text:span><text:span text:style-name="T4">tur</text:span><text:span text:style-name="T4">in</text:span><text:span text:style-name="T4">g </text:span><text:span text:style-name="T4">pr</text:span><text:span text:style-name="T4">oc</text:span><text:span text:style-name="T4">es</text:span><text:span text:style-name="T4">s.</text:span></text:p>
          </draw:text-box>
        </draw:frame>
      </draw:page>
      <draw:page draw:name="page4" draw:style-name="dp1" draw:master-page-name="master-page34">
        <draw:frame draw:style-name="gr6" draw:text-style-name="P4" draw:layer="layout" svg:width="0.001cm" svg:height="0.001cm" svg:x="6cm" svg:y="1.3cm">
          <draw:image xlink:href="Pictures/100000000000025A000002FD61CE5408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0.746cm" svg:x="2.099cm" svg:y="2.035cm">
          <draw:text-box>
            <text:p text:style-name="P1"><text:span text:style-name="T5">3. </text:span><text:span text:style-name="T5">D</text:span><text:span text:style-name="T5">S</text:span><text:span text:style-name="T5">系</text:span><text:span text:style-name="T5">列 </text:span><text:span text:style-name="T5">- </text:span><text:span text:style-name="T5">电</text:span><text:span text:style-name="T5">子</text:span><text:span text:style-name="T5">级 </text:span><text:span text:style-name="T5">/ </text:span><text:span text:style-name="T5">D</text:span><text:span text:style-name="T5">S </text:span><text:span text:style-name="T5">S</text:span><text:span text:style-name="T5">er</text:span><text:span text:style-name="T5">ie</text:span><text:span text:style-name="T5">s </text:span><text:span text:style-name="T5">- </text:span><text:span text:style-name="T5">El</text:span><text:span text:style-name="T5">e</text:span><text:span text:style-name="T5">ct</text:span><text:span text:style-name="T5">r</text:span><text:span text:style-name="T5">o</text:span><text:span text:style-name="T5">ni</text:span><text:span text:style-name="T5">c </text:span><text:span text:style-name="T5">G</text:span><text:span text:style-name="T5">ra</text:span><text:span text:style-name="T5">d</text:span><text:span text:style-name="T5">e</text:span></text:p>
          </draw:text-box>
        </draw:frame>
        <draw:frame draw:style-name="gr20" draw:text-style-name="P5" draw:layer="layout" svg:width="8.022cm" svg:height="0.446cm" svg:x="2.099cm" svg:y="3.124cm">
          <draw:text-box>
            <text:p text:style-name="P1"><text:span text:style-name="T4">材质</text:span><text:span text:style-name="T4">: </text:span><text:span text:style-name="T4">聚酯</text:span><text:span text:style-name="T4">+</text:span><text:span text:style-name="T4">尼龙</text:span><text:span text:style-name="T4">针织 </text:span><text:span text:style-name="T4">/ </text:span><text:span text:style-name="T4">Polyest</text:span><text:span text:style-name="T4">er + </text:span><text:span text:style-name="T4">Nylon </text:span><text:span text:style-name="T4">Knitted</text:span></text:p>
          </draw:text-box>
        </draw:frame>
        <draw:frame draw:style-name="gr21" draw:text-style-name="P5" draw:layer="layout" svg:width="3.8cm" svg:height="0.446cm" svg:x="2.099cm" svg:y="3.768cm">
          <draw:text-box>
            <text:p text:style-name="P1"><text:span text:style-name="T4">洁净度</text:span><text:span text:style-name="T4">: </text:span><text:span text:style-name="T4">Class </text:span><text:span text:style-name="T4">100~100</text:span><text:span text:style-name="T4">0</text:span></text:p>
          </draw:text-box>
        </draw:frame>
        <draw:frame draw:style-name="gr22" draw:text-style-name="P5" draw:layer="layout" svg:width="6.146cm" svg:height="0.446cm" svg:x="2.099cm" svg:y="4.412cm">
          <draw:text-box>
            <text:p text:style-name="P1"><text:span text:style-name="T4">切</text:span><text:span text:style-name="T4">割</text:span><text:span text:style-name="T4">方</text:span><text:span text:style-name="T4">式</text:span><text:span text:style-name="T4">: </text:span><text:span text:style-name="T4">激</text:span><text:span text:style-name="T4">光</text:span><text:span text:style-name="T4">(</text:span><text:span text:style-name="T4">标</text:span><text:span text:style-name="T4">准</text:span><text:span text:style-name="T4">) </text:span><text:span text:style-name="T4">/ </text:span><text:span text:style-name="T4">超</text:span><text:span text:style-name="T4">声</text:span><text:span text:style-name="T4">波 </text:span><text:span text:style-name="T4">/ </text:span><text:span text:style-name="T4">冷</text:span><text:span text:style-name="T4">切</text:span></text:p>
          </draw:text-box>
        </draw:frame>
        <draw:frame draw:style-name="gr23" draw:text-style-name="P5" draw:layer="layout" svg:width="3.704cm" svg:height="0.446cm" svg:x="2.099cm" svg:y="5.056cm">
          <draw:text-box>
            <text:p text:style-name="P1"><text:span text:style-name="T4">标准颜</text:span><text:span text:style-name="T4">色</text:span><text:span text:style-name="T4">: </text:span><text:span text:style-name="T4">白、</text:span><text:span text:style-name="T4">蓝、米</text:span><text:span text:style-name="T4">色</text:span></text:p>
          </draw:text-box>
        </draw:frame>
        <draw:frame draw:style-name="gr24" draw:text-style-name="P6" draw:layer="layout" svg:width="0.603cm" svg:height="0.399cm" svg:x="3.275cm" svg:y="6.008cm">
          <draw:text-box>
            <text:p text:style-name="P1"><text:span text:style-name="T6">型号</text:span></text:p>
          </draw:text-box>
        </draw:frame>
        <draw:frame draw:style-name="gr24" draw:text-style-name="P6" draw:layer="layout" svg:width="0.603cm" svg:height="0.399cm" svg:x="6.275cm" svg:y="6.008cm">
          <draw:text-box>
            <text:p text:style-name="P1"><text:span text:style-name="T6">英寸</text:span></text:p>
          </draw:text-box>
        </draw:frame>
        <draw:frame draw:style-name="gr24" draw:text-style-name="P6" draw:layer="layout" svg:width="0.603cm" svg:height="0.399cm" svg:x="8.9cm" svg:y="6.008cm">
          <draw:text-box>
            <text:p text:style-name="P1"><text:span text:style-name="T6">厘米</text:span></text:p>
          </draw:text-box>
        </draw:frame>
        <draw:frame draw:style-name="gr25" draw:text-style-name="P6" draw:layer="layout" svg:width="1.075cm" svg:height="0.399cm" svg:x="11.329cm" svg:y="6.008cm">
          <draw:text-box>
            <text:p text:style-name="P1"><text:span text:style-name="T6">重量</text:span><text:span text:style-name="T6">(g)</text:span></text:p>
          </draw:text-box>
        </draw:frame>
        <draw:frame draw:style-name="gr24" draw:text-style-name="P6" draw:layer="layout" svg:width="0.603cm" svg:height="0.399cm" svg:x="14.525cm" svg:y="6.008cm">
          <draw:text-box>
            <text:p text:style-name="P1"><text:span text:style-name="T6">包装</text:span></text:p>
          </draw:text-box>
        </draw:frame>
        <draw:frame draw:style-name="gr26" draw:text-style-name="P6" draw:layer="layout" svg:width="0.904cm" svg:height="0.399cm" svg:x="17.363cm" svg:y="17.211cm">
          <draw:text-box>
            <text:p text:style-name="P1"><text:span text:style-name="T6">洁</text:span><text:span text:style-name="T6">净</text:span><text:span text:style-name="T6">度</text:span></text:p>
          </draw:text-box>
        </draw:frame>
        <draw:frame draw:style-name="gr27" draw:text-style-name="P7" draw:layer="layout" svg:width="1.17cm" svg:height="0.378cm" svg:x="2.994cm" svg:y="6.644cm">
          <draw:text-box>
            <text:p text:style-name="P1"><text:span text:style-name="T7">DS-0</text:span><text:span text:style-name="T7">404</text:span></text:p>
          </draw:text-box>
        </draw:frame>
        <draw:frame draw:style-name="gr28" draw:text-style-name="P7" draw:layer="layout" svg:width="0.478cm" svg:height="0.378cm" svg:x="6.337cm" svg:y="6.644cm">
          <draw:text-box>
            <text:p text:style-name="P1"><text:span text:style-name="T7">4x4</text:span></text:p>
          </draw:text-box>
        </draw:frame>
        <draw:frame draw:style-name="gr29" draw:text-style-name="P7" draw:layer="layout" svg:width="0.811cm" svg:height="0.378cm" svg:x="8.797cm" svg:y="6.644cm">
          <draw:text-box>
            <text:p text:style-name="P1"><text:span text:style-name="T7">10x10</text:span></text:p>
          </draw:text-box>
        </draw:frame>
        <draw:frame draw:style-name="gr30" draw:text-style-name="P7" draw:layer="layout" svg:width="0.569cm" svg:height="0.378cm" svg:x="11.542cm" svg:y="6.644cm">
          <draw:text-box>
            <text:p text:style-name="P1"><text:span text:style-name="T7">0.12</text:span></text:p>
          </draw:text-box>
        </draw:frame>
        <draw:frame draw:style-name="gr31" draw:text-style-name="P7" draw:layer="layout" svg:width="0.958cm" svg:height="0.378cm" svg:x="14.349cm" svg:y="6.644cm">
          <draw:text-box>
            <text:p text:style-name="P1"><text:span text:style-name="T7">100</text:span><text:span text:style-name="T7">/pk</text:span></text:p>
          </draw:text-box>
        </draw:frame>
        <draw:frame draw:style-name="gr32" draw:text-style-name="P7" draw:layer="layout" svg:width="1.479cm" svg:height="0.378cm" svg:x="16.471cm" svg:y="6.6cm">
          <draw:text-box>
            <text:p text:style-name="P1"><text:span text:style-name="T7">C100-1000</text:span></text:p>
          </draw:text-box>
        </draw:frame>
        <draw:frame draw:style-name="gr27" draw:text-style-name="P7" draw:layer="layout" svg:width="1.17cm" svg:height="0.378cm" svg:x="2.994cm" svg:y="7.244cm">
          <draw:text-box>
            <text:p text:style-name="P1"><text:span text:style-name="T7">DS-06</text:span><text:span text:style-name="T7">06</text:span></text:p>
          </draw:text-box>
        </draw:frame>
        <draw:frame draw:style-name="gr28" draw:text-style-name="P7" draw:layer="layout" svg:width="0.478cm" svg:height="0.378cm" svg:x="6.337cm" svg:y="7.244cm">
          <draw:text-box>
            <text:p text:style-name="P1"><text:span text:style-name="T7">6x6</text:span></text:p>
          </draw:text-box>
        </draw:frame>
        <draw:frame draw:style-name="gr29" draw:text-style-name="P7" draw:layer="layout" svg:width="0.811cm" svg:height="0.378cm" svg:x="8.797cm" svg:y="7.244cm">
          <draw:text-box>
            <text:p text:style-name="P1"><text:span text:style-name="T7">15x</text:span><text:span text:style-name="T7">15</text:span></text:p>
          </draw:text-box>
        </draw:frame>
        <draw:frame draw:style-name="gr30" draw:text-style-name="P7" draw:layer="layout" svg:width="0.569cm" svg:height="0.378cm" svg:x="11.542cm" svg:y="7.244cm">
          <draw:text-box>
            <text:p text:style-name="P1"><text:span text:style-name="T7">0.25</text:span></text:p>
          </draw:text-box>
        </draw:frame>
        <draw:frame draw:style-name="gr31" draw:text-style-name="P7" draw:layer="layout" svg:width="0.958cm" svg:height="0.378cm" svg:x="14.349cm" svg:y="7.244cm">
          <draw:text-box>
            <text:p text:style-name="P1"><text:span text:style-name="T7">10</text:span><text:span text:style-name="T7">0/</text:span><text:span text:style-name="T7">pk</text:span></text:p>
          </draw:text-box>
        </draw:frame>
        <draw:frame draw:style-name="gr32" draw:text-style-name="P7" draw:layer="layout" svg:width="1.479cm" svg:height="0.378cm" svg:x="16.471cm" svg:y="7.2cm">
          <draw:text-box>
            <text:p text:style-name="P1"><text:span text:style-name="T7">C100-</text:span><text:span text:style-name="T7">1000</text:span></text:p>
          </draw:text-box>
        </draw:frame>
        <draw:frame draw:style-name="gr27" draw:text-style-name="P7" draw:layer="layout" svg:width="1.17cm" svg:height="0.378cm" svg:x="2.994cm" svg:y="7.843cm">
          <draw:text-box>
            <text:p text:style-name="P1"><text:span text:style-name="T7">DS-</text:span><text:span text:style-name="T7">090</text:span><text:span text:style-name="T7">9</text:span></text:p>
          </draw:text-box>
        </draw:frame>
        <draw:frame draw:style-name="gr28" draw:text-style-name="P7" draw:layer="layout" svg:width="0.478cm" svg:height="0.378cm" svg:x="6.337cm" svg:y="7.843cm">
          <draw:text-box>
            <text:p text:style-name="P1"><text:span text:style-name="T7">9x9</text:span></text:p>
          </draw:text-box>
        </draw:frame>
        <draw:frame draw:style-name="gr33" draw:text-style-name="P7" draw:layer="layout" svg:width="1.28cm" svg:height="0.378cm" svg:x="8.564cm" svg:y="7.843cm">
          <draw:text-box>
            <text:p text:style-name="P1"><text:span text:style-name="T7">22.5</text:span><text:span text:style-name="T7">x22.</text:span><text:span text:style-name="T7">5</text:span></text:p>
          </draw:text-box>
        </draw:frame>
        <draw:frame draw:style-name="gr30" draw:text-style-name="P7" draw:layer="layout" svg:width="0.569cm" svg:height="0.378cm" svg:x="11.542cm" svg:y="7.843cm">
          <draw:text-box>
            <text:p text:style-name="P1"><text:span text:style-name="T7">0.45</text:span></text:p>
          </draw:text-box>
        </draw:frame>
        <draw:frame draw:style-name="gr31" draw:text-style-name="P7" draw:layer="layout" svg:width="0.958cm" svg:height="0.378cm" svg:x="14.349cm" svg:y="7.843cm">
          <draw:text-box>
            <text:p text:style-name="P1"><text:span text:style-name="T7">100/pk</text:span></text:p>
          </draw:text-box>
        </draw:frame>
        <draw:frame draw:style-name="gr32" draw:text-style-name="P7" draw:layer="layout" svg:width="1.479cm" svg:height="0.378cm" svg:x="16.471cm" svg:y="7.799cm">
          <draw:text-box>
            <text:p text:style-name="P1"><text:span text:style-name="T7">C100-1000</text:span></text:p>
          </draw:text-box>
        </draw:frame>
        <draw:frame draw:style-name="gr27" draw:text-style-name="P7" draw:layer="layout" svg:width="1.17cm" svg:height="0.378cm" svg:x="2.994cm" svg:y="8.443cm">
          <draw:text-box>
            <text:p text:style-name="P1"><text:span text:style-name="T7">DS-1212</text:span></text:p>
          </draw:text-box>
        </draw:frame>
        <draw:frame draw:style-name="gr29" draw:text-style-name="P7" draw:layer="layout" svg:width="0.811cm" svg:height="0.378cm" svg:x="6.172cm" svg:y="8.443cm">
          <draw:text-box>
            <text:p text:style-name="P1"><text:span text:style-name="T7">12x</text:span><text:span text:style-name="T7">12</text:span></text:p>
          </draw:text-box>
        </draw:frame>
        <draw:frame draw:style-name="gr29" draw:text-style-name="P7" draw:layer="layout" svg:width="0.811cm" svg:height="0.378cm" svg:x="8.797cm" svg:y="8.443cm">
          <draw:text-box>
            <text:p text:style-name="P1"><text:span text:style-name="T7">30x30</text:span></text:p>
          </draw:text-box>
        </draw:frame>
        <draw:frame draw:style-name="gr30" draw:text-style-name="P7" draw:layer="layout" svg:width="0.569cm" svg:height="0.378cm" svg:x="11.542cm" svg:y="8.443cm">
          <draw:text-box>
            <text:p text:style-name="P1"><text:span text:style-name="T7">0.70</text:span></text:p>
          </draw:text-box>
        </draw:frame>
        <draw:frame draw:style-name="gr31" draw:text-style-name="P7" draw:layer="layout" svg:width="0.958cm" svg:height="0.378cm" svg:x="14.349cm" svg:y="8.443cm">
          <draw:text-box>
            <text:p text:style-name="P1"><text:span text:style-name="T7">100/pk</text:span></text:p>
          </draw:text-box>
        </draw:frame>
        <draw:frame draw:style-name="gr32" draw:text-style-name="P7" draw:layer="layout" svg:width="1.479cm" svg:height="0.378cm" svg:x="16.471cm" svg:y="8.399cm">
          <draw:text-box>
            <text:p text:style-name="P1"><text:span text:style-name="T7">C100-1000</text:span></text:p>
          </draw:text-box>
        </draw:frame>
        <draw:frame draw:style-name="gr27" draw:text-style-name="P7" draw:layer="layout" svg:width="1.17cm" svg:height="0.378cm" svg:x="2.994cm" svg:y="9.043cm">
          <draw:text-box>
            <text:p text:style-name="P1"><text:span text:style-name="T7">D</text:span><text:span text:style-name="T7">S</text:span><text:span text:style-name="T7">-</text:span><text:span text:style-name="T7">1</text:span><text:span text:style-name="T7">8</text:span><text:span text:style-name="T7">1</text:span><text:span text:style-name="T7">8</text:span></text:p>
          </draw:text-box>
        </draw:frame>
        <draw:frame draw:style-name="gr29" draw:text-style-name="P7" draw:layer="layout" svg:width="0.811cm" svg:height="0.378cm" svg:x="6.172cm" svg:y="9.043cm">
          <draw:text-box>
            <text:p text:style-name="P1"><text:span text:style-name="T7">18x18</text:span></text:p>
          </draw:text-box>
        </draw:frame>
        <draw:frame draw:style-name="gr29" draw:text-style-name="P7" draw:layer="layout" svg:width="0.811cm" svg:height="0.378cm" svg:x="8.797cm" svg:y="9.043cm">
          <draw:text-box>
            <text:p text:style-name="P1"><text:span text:style-name="T7">45x45</text:span></text:p>
          </draw:text-box>
        </draw:frame>
        <draw:frame draw:style-name="gr30" draw:text-style-name="P7" draw:layer="layout" svg:width="0.569cm" svg:height="0.378cm" svg:x="11.542cm" svg:y="9.043cm">
          <draw:text-box>
            <text:p text:style-name="P1"><text:span text:style-name="T7">1.85</text:span></text:p>
          </draw:text-box>
        </draw:frame>
        <draw:frame draw:style-name="gr31" draw:text-style-name="P7" draw:layer="layout" svg:width="0.958cm" svg:height="0.378cm" svg:x="14.349cm" svg:y="9.043cm">
          <draw:text-box>
            <text:p text:style-name="P1"><text:span text:style-name="T7">100/pk</text:span></text:p>
          </draw:text-box>
        </draw:frame>
        <draw:frame draw:style-name="gr6" draw:text-style-name="P4" draw:layer="layout" svg:width="5.499cm" svg:height="5.499cm" svg:x="7.701cm" svg:y="10.85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32" draw:text-style-name="P7" draw:layer="layout" svg:width="1.479cm" svg:height="0.378cm" svg:x="16.471cm" svg:y="8.999cm">
          <draw:text-box>
            <text:p text:style-name="P1"><text:span text:style-name="T7">C100-1000</text:span></text:p>
          </draw:text-box>
        </draw:frame>
        <draw:frame draw:style-name="gr34" draw:text-style-name="P3" draw:layer="layout" svg:width="13.46cm" svg:height="0.746cm" svg:x="1.912cm" svg:y="17.35cm">
          <draw:text-box>
            <text:p text:style-name="P1"><text:span text:style-name="T5">4. KH</text:span><text:span text:style-name="T5">系列 </text:span><text:span text:style-name="T5">- </text:span><text:span text:style-name="T5">工业级 </text:span><text:span text:style-name="T5">/ KH Series - Industrial Wipes</text:span></text:p>
          </draw:text-box>
        </draw:frame>
        <draw:frame draw:style-name="gr35" draw:text-style-name="P5" draw:layer="layout" svg:width="4.628cm" svg:height="0.446cm" svg:x="1.912cm" svg:y="18.439cm">
          <draw:text-box>
            <text:p text:style-name="P1"><text:span text:style-name="T4">材质</text:span><text:span text:style-name="T4">: </text:span><text:span text:style-name="T4">聚酯针织 </text:span><text:span text:style-name="T4">(</text:span><text:span text:style-name="T4">非无尘室级</text:span><text:span text:style-name="T4">)</text:span></text:p>
          </draw:text-box>
        </draw:frame>
        <draw:frame draw:style-name="gr36" draw:text-style-name="P5" draw:layer="layout" svg:width="4.038cm" svg:height="0.446cm" svg:x="1.912cm" svg:y="19.083cm">
          <draw:text-box>
            <text:p text:style-name="P1"><text:span text:style-name="T4">应用</text:span><text:span text:style-name="T4">: </text:span><text:span text:style-name="T4">一般工业清洁、车间</text:span></text:p>
          </draw:text-box>
        </draw:frame>
        <draw:frame draw:style-name="gr24" draw:text-style-name="P6" draw:layer="layout" svg:width="0.603cm" svg:height="0.399cm" svg:x="3.4cm" svg:y="19.835cm">
          <draw:text-box>
            <text:p text:style-name="P1"><text:span text:style-name="T6">型号</text:span></text:p>
          </draw:text-box>
        </draw:frame>
        <draw:frame draw:style-name="gr24" draw:text-style-name="P6" draw:layer="layout" svg:width="0.603cm" svg:height="0.399cm" svg:x="7cm" svg:y="19.835cm">
          <draw:text-box>
            <text:p text:style-name="P1"><text:span text:style-name="T6">英寸</text:span></text:p>
          </draw:text-box>
        </draw:frame>
        <draw:frame draw:style-name="gr24" draw:text-style-name="P6" draw:layer="layout" svg:width="0.603cm" svg:height="0.399cm" svg:x="10.2cm" svg:y="19.835cm">
          <draw:text-box>
            <text:p text:style-name="P1"><text:span text:style-name="T6">厘米</text:span></text:p>
          </draw:text-box>
        </draw:frame>
        <draw:frame draw:style-name="gr25" draw:text-style-name="P6" draw:layer="layout" svg:width="1.075cm" svg:height="0.399cm" svg:x="13.404cm" svg:y="19.835cm">
          <draw:text-box>
            <text:p text:style-name="P1"><text:span text:style-name="T6">重量</text:span><text:span text:style-name="T6">(g)</text:span></text:p>
          </draw:text-box>
        </draw:frame>
        <draw:frame draw:style-name="gr24" draw:text-style-name="P6" draw:layer="layout" svg:width="0.603cm" svg:height="0.399cm" svg:x="17.4cm" svg:y="19.835cm">
          <draw:text-box>
            <text:p text:style-name="P1"><text:span text:style-name="T6">包装</text:span></text:p>
          </draw:text-box>
        </draw:frame>
        <draw:frame draw:style-name="gr37" draw:text-style-name="P7" draw:layer="layout" svg:width="1.189cm" svg:height="0.378cm" svg:x="3.109cm" svg:y="20.471cm">
          <draw:text-box>
            <text:p text:style-name="P1"><text:span text:style-name="T7">KH-0606</text:span></text:p>
          </draw:text-box>
        </draw:frame>
        <draw:frame draw:style-name="gr28" draw:text-style-name="P7" draw:layer="layout" svg:width="0.478cm" svg:height="0.378cm" svg:x="7.063cm" svg:y="20.471cm">
          <draw:text-box>
            <text:p text:style-name="P1"><text:span text:style-name="T7">6x6</text:span></text:p>
          </draw:text-box>
        </draw:frame>
        <draw:frame draw:style-name="gr29" draw:text-style-name="P7" draw:layer="layout" svg:width="0.811cm" svg:height="0.378cm" svg:x="10.097cm" svg:y="20.471cm">
          <draw:text-box>
            <text:p text:style-name="P1"><text:span text:style-name="T7">15x15</text:span></text:p>
          </draw:text-box>
        </draw:frame>
        <draw:frame draw:style-name="gr38" draw:text-style-name="P7" draw:layer="layout" svg:width="0.559cm" svg:height="0.378cm" svg:x="13.623cm" svg:y="20.471cm">
          <draw:text-box>
            <text:p text:style-name="P1"><text:span text:style-name="T7">TBD</text:span></text:p>
          </draw:text-box>
        </draw:frame>
        <draw:frame draw:style-name="gr31" draw:text-style-name="P7" draw:layer="layout" svg:width="0.958cm" svg:height="0.378cm" svg:x="17.225cm" svg:y="20.471cm">
          <draw:text-box>
            <text:p text:style-name="P1"><text:span text:style-name="T7">100/pk</text:span></text:p>
          </draw:text-box>
        </draw:frame>
        <draw:frame draw:style-name="gr37" draw:text-style-name="P7" draw:layer="layout" svg:width="1.189cm" svg:height="0.378cm" svg:x="3.109cm" svg:y="21.071cm">
          <draw:text-box>
            <text:p text:style-name="P1"><text:span text:style-name="T7">KH-0909</text:span></text:p>
          </draw:text-box>
        </draw:frame>
        <draw:frame draw:style-name="gr28" draw:text-style-name="P7" draw:layer="layout" svg:width="0.478cm" svg:height="0.378cm" svg:x="7.063cm" svg:y="21.071cm">
          <draw:text-box>
            <text:p text:style-name="P1"><text:span text:style-name="T7">9x9</text:span></text:p>
          </draw:text-box>
        </draw:frame>
        <draw:frame draw:style-name="gr33" draw:text-style-name="P7" draw:layer="layout" svg:width="1.28cm" svg:height="0.378cm" svg:x="9.864cm" svg:y="21.071cm">
          <draw:text-box>
            <text:p text:style-name="P1"><text:span text:style-name="T7">22.5x22.5</text:span></text:p>
          </draw:text-box>
        </draw:frame>
        <draw:frame draw:style-name="gr38" draw:text-style-name="P7" draw:layer="layout" svg:width="0.559cm" svg:height="0.378cm" svg:x="13.623cm" svg:y="21.071cm">
          <draw:text-box>
            <text:p text:style-name="P1"><text:span text:style-name="T7">TBD</text:span></text:p>
          </draw:text-box>
        </draw:frame>
        <draw:frame draw:style-name="gr31" draw:text-style-name="P7" draw:layer="layout" svg:width="0.958cm" svg:height="0.378cm" svg:x="17.225cm" svg:y="21.071cm">
          <draw:text-box>
            <text:p text:style-name="P1"><text:span text:style-name="T7">100/pk</text:span></text:p>
          </draw:text-box>
        </draw:frame>
        <draw:frame draw:style-name="gr37" draw:text-style-name="P7" draw:layer="layout" svg:width="1.189cm" svg:height="0.378cm" svg:x="3.109cm" svg:y="21.67cm">
          <draw:text-box>
            <text:p text:style-name="P1"><text:span text:style-name="T7">KH-1212</text:span></text:p>
          </draw:text-box>
        </draw:frame>
        <draw:frame draw:style-name="gr29" draw:text-style-name="P7" draw:layer="layout" svg:width="0.811cm" svg:height="0.378cm" svg:x="6.897cm" svg:y="21.67cm">
          <draw:text-box>
            <text:p text:style-name="P1"><text:span text:style-name="T7">12x12</text:span></text:p>
          </draw:text-box>
        </draw:frame>
        <draw:frame draw:style-name="gr29" draw:text-style-name="P7" draw:layer="layout" svg:width="0.811cm" svg:height="0.378cm" svg:x="10.097cm" svg:y="21.67cm">
          <draw:text-box>
            <text:p text:style-name="P1"><text:span text:style-name="T7">30x30</text:span></text:p>
          </draw:text-box>
        </draw:frame>
        <draw:frame draw:style-name="gr38" draw:text-style-name="P7" draw:layer="layout" svg:width="0.559cm" svg:height="0.378cm" svg:x="13.623cm" svg:y="21.67cm">
          <draw:text-box>
            <text:p text:style-name="P1"><text:span text:style-name="T7">TBD</text:span></text:p>
          </draw:text-box>
        </draw:frame>
        <draw:line draw:style-name="gr39" draw:text-style-name="P4" draw:layer="layout" svg:x1="1.7cm" svg:y1="22.18cm" svg:x2="1.7cm" svg:y2="19.746cm">
          <text:p/>
        </draw:line>
        <draw:line draw:style-name="gr39" draw:text-style-name="P4" draw:layer="layout" svg:x1="5.699cm" svg:y1="22.18cm" svg:x2="5.699cm" svg:y2="19.746cm">
          <text:p/>
        </draw:line>
        <draw:line draw:style-name="gr39" draw:text-style-name="P4" draw:layer="layout" svg:x1="8.9cm" svg:y1="22.18cm" svg:x2="8.9cm" svg:y2="19.746cm">
          <text:p/>
        </draw:line>
        <draw:line draw:style-name="gr39" draw:text-style-name="P4" draw:layer="layout" svg:x1="12.099cm" svg:y1="22.18cm" svg:x2="12.099cm" svg:y2="19.746cm">
          <text:p/>
        </draw:line>
        <draw:line draw:style-name="gr39" draw:text-style-name="P4" draw:layer="layout" svg:x1="15.7cm" svg:y1="22.18cm" svg:x2="15.7cm" svg:y2="19.746cm">
          <text:p/>
        </draw:line>
        <draw:frame draw:style-name="gr31" draw:text-style-name="P7" draw:layer="layout" svg:width="0.958cm" svg:height="0.378cm" svg:x="17.225cm" svg:y="21.67cm">
          <draw:text-box>
            <text:p text:style-name="P1"><text:span text:style-name="T7">100/pk</text:span></text:p>
          </draw:text-box>
        </draw:frame>
        <draw:frame draw:style-name="gr6" draw:text-style-name="P4" draw:layer="layout" svg:width="4.937cm" svg:height="4.999cm" svg:x="8.231cm" svg:y="23.125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40" draw:text-style-name="P5" draw:layer="layout" svg:width="3.839cm" svg:height="0.446cm" svg:x="1.912cm" svg:y="22.161cm">
          <draw:text-box>
            <text:p text:style-name="P1"><text:span text:style-name="T4">注</text:span><text:span text:style-name="T4">: KH</text:span><text:span text:style-name="T4">重量待工厂确认。</text:span></text:p>
          </draw:text-box>
        </draw:frame>
        <draw:polygon draw:style-name="gr41" draw:text-style-name="P8" draw:layer="layout" svg:width="17.999cm" svg:height="0.636cm" svg:x="1.7cm" svg:y="19.6cm" svg:viewBox="0 0 18000 637" draw:points="0,0 18000,0 18000,637 0,637">
          <text:p/>
        </draw:polygon>
        <draw:line draw:style-name="gr39" draw:text-style-name="P4" draw:layer="layout" svg:x1="1.7cm" svg:y1="20.85cm" svg:x2="19.699cm" svg:y2="20.85cm">
          <text:p/>
        </draw:line>
        <draw:line draw:style-name="gr39" draw:text-style-name="P4" draw:layer="layout" svg:x1="1.701cm" svg:y1="22.1cm" svg:x2="19.7cm" svg:y2="22.1cm">
          <text:p/>
        </draw:line>
        <draw:line draw:style-name="gr39" draw:text-style-name="P4" draw:layer="layout" svg:x1="1.701cm" svg:y1="21.6cm" svg:x2="19.7cm" svg:y2="21.6cm">
          <text:p/>
        </draw:line>
      </draw:page>
      <draw:page draw:name="page7" draw:style-name="dp1" draw:master-page-name="master-page67">
        <draw:polygon draw:style-name="gr42" draw:text-style-name="P9" draw:layer="layout" svg:width="17.999cm" svg:height="0.636cm" svg:x="1.5cm" svg:y="2.787cm" svg:viewBox="0 0 18000 637" draw:points="0,0 18000,0 18000,637 0,637">
          <text:p/>
        </draw:polygon>
        <draw:frame draw:style-name="gr43" draw:text-style-name="P11" draw:layer="layout" svg:width="8.841cm" svg:height="0.746cm" svg:x="1.712cm" svg:y="1.679cm">
          <draw:text-box>
            <text:p text:style-name="P10"><text:span text:style-name="T5">6. </text:span><text:span text:style-name="T5">包装选项 </text:span><text:span text:style-name="T5">/ Packaging Options</text:span></text:p>
          </draw:text-box>
        </draw:frame>
        <draw:frame draw:style-name="gr44" draw:text-style-name="P13" draw:layer="layout" svg:width="1.465cm" svg:height="0.399cm" svg:x="4.41cm" svg:y="2.876cm">
          <draw:text-box>
            <text:p text:style-name="P12"><text:span text:style-name="T6">类型 </text:span><text:span text:style-name="T6">Type</text:span></text:p>
          </draw:text-box>
        </draw:frame>
        <draw:frame draw:style-name="gr45" draw:text-style-name="P13" draw:layer="layout" svg:width="2.415cm" svg:height="0.399cm" svg:x="12.936cm" svg:y="2.876cm">
          <draw:text-box>
            <text:p text:style-name="P12"><text:span text:style-name="T6">描述 </text:span><text:span text:style-name="T6">Description</text:span></text:p>
          </draw:text-box>
        </draw:frame>
        <draw:frame draw:style-name="gr46" draw:text-style-name="P15" draw:layer="layout" svg:width="2.192cm" svg:height="0.378cm" svg:x="4.048cm" svg:y="3.512cm">
          <draw:text-box>
            <text:p text:style-name="P14"><text:span text:style-name="T7">塑料袋 </text:span><text:span text:style-name="T7">Poly Bag</text:span></text:p>
          </draw:text-box>
        </draw:frame>
        <draw:frame draw:style-name="gr47" draw:text-style-name="P15" draw:layer="layout" svg:width="2.833cm" svg:height="0.378cm" svg:x="12.804cm" svg:y="3.512cm">
          <draw:text-box>
            <text:p text:style-name="P14"><text:span text:style-name="T7">100</text:span><text:span text:style-name="T7">片</text:span><text:span text:style-name="T7">/</text:span><text:span text:style-name="T7">包，标准包装</text:span></text:p>
          </draw:text-box>
        </draw:frame>
        <draw:frame draw:style-name="gr48" draw:text-style-name="P15" draw:layer="layout" svg:width="3.112cm" svg:height="0.378cm" svg:x="3.59cm" svg:y="4.112cm">
          <draw:text-box>
            <text:p text:style-name="P14"><text:span text:style-name="T7">真空包装 </text:span><text:span text:style-name="T7">Vacuum Pack</text:span></text:p>
          </draw:text-box>
        </draw:frame>
        <draw:frame draw:style-name="gr49" draw:text-style-name="P15" draw:layer="layout" svg:width="1.987cm" svg:height="0.378cm" svg:x="13.112cm" svg:y="4.112cm">
          <draw:text-box>
            <text:p text:style-name="P16"><text:span text:style-name="T7">用于高洁净要求</text:span></text:p>
          </draw:text-box>
        </draw:frame>
        <draw:frame draw:style-name="gr50" draw:text-style-name="P15" draw:layer="layout" svg:width="3.408cm" svg:height="0.378cm" svg:x="3.443cm" svg:y="4.712cm">
          <draw:text-box>
            <text:p text:style-name="P14"><text:span text:style-name="T7">双层包装 </text:span><text:span text:style-name="T7">Double Bagged</text:span></text:p>
          </draw:text-box>
        </draw:frame>
        <draw:frame draw:style-name="gr51" draw:text-style-name="P15" draw:layer="layout" svg:width="3.429cm" svg:height="0.378cm" svg:x="12.469cm" svg:y="4.712cm">
          <draw:text-box>
            <text:p text:style-name="P16"><text:span text:style-name="T7">用于</text:span><text:span text:style-name="T7">Class 100~1000</text:span><text:span text:style-name="T7">环境</text:span></text:p>
          </draw:text-box>
        </draw:frame>
        <draw:frame draw:style-name="gr52" draw:text-style-name="P15" draw:layer="layout" svg:width="2.022cm" svg:height="0.378cm" svg:x="4.132cm" svg:y="5.311cm">
          <draw:text-box>
            <text:p text:style-name="P14"><text:span text:style-name="T7">散装 </text:span><text:span text:style-name="T7">Bulk Pack</text:span></text:p>
          </draw:text-box>
        </draw:frame>
        <draw:line draw:style-name="gr39" draw:text-style-name="P4" draw:layer="layout" svg:x1="1.5cm" svg:y1="2.787cm" svg:x2="19.499cm" svg:y2="2.787cm">
          <text:p/>
        </draw:line>
        <draw:line draw:style-name="gr39" draw:text-style-name="P4" draw:layer="layout" svg:x1="1.5cm" svg:y1="5.821cm" svg:x2="19.499cm" svg:y2="5.821cm">
          <text:p/>
        </draw:line>
        <draw:line draw:style-name="gr39" draw:text-style-name="P4" draw:layer="layout" svg:x1="1.5cm" svg:y1="5.821cm" svg:x2="1.5cm" svg:y2="2.787cm">
          <text:p/>
        </draw:line>
        <draw:line draw:style-name="gr39" draw:text-style-name="P4" draw:layer="layout" svg:x1="19.499cm" svg:y1="5.821cm" svg:x2="19.499cm" svg:y2="2.787cm">
          <text:p/>
        </draw:line>
        <draw:line draw:style-name="gr39" draw:text-style-name="P4" draw:layer="layout" svg:x1="1.5cm" svg:y1="3.422cm" svg:x2="19.499cm" svg:y2="3.422cm">
          <text:p/>
        </draw:line>
        <draw:line draw:style-name="gr39" draw:text-style-name="P4" draw:layer="layout" svg:x1="1.5cm" svg:y1="4.022cm" svg:x2="19.499cm" svg:y2="4.022cm">
          <text:p/>
        </draw:line>
        <draw:line draw:style-name="gr39" draw:text-style-name="P4" draw:layer="layout" svg:x1="1.5cm" svg:y1="4.622cm" svg:x2="19.499cm" svg:y2="4.622cm">
          <text:p/>
        </draw:line>
        <draw:line draw:style-name="gr39" draw:text-style-name="P4" draw:layer="layout" svg:x1="1.5cm" svg:y1="5.221cm" svg:x2="19.499cm" svg:y2="5.221cm">
          <text:p/>
        </draw:line>
        <draw:line draw:style-name="gr39" draw:text-style-name="P4" draw:layer="layout" svg:x1="8.7cm" svg:y1="5.821cm" svg:x2="8.7cm" svg:y2="2.787cm">
          <text:p/>
        </draw:line>
        <draw:frame draw:style-name="gr53" draw:text-style-name="P15" draw:layer="layout" svg:width="2.271cm" svg:height="0.378cm" svg:x="12.971cm" svg:y="5.311cm">
          <draw:text-box>
            <text:p text:style-name="P16"><text:span text:style-name="T7">工业级，经济实惠</text:span></text:p>
          </draw:text-box>
        </draw:frame>
        <draw:polygon draw:style-name="gr42" draw:text-style-name="P9" draw:layer="layout" svg:width="17.999cm" svg:height="0.636cm" svg:x="1.5cm" svg:y="7.697cm" svg:viewBox="0 0 18000 637" draw:points="0,0 18000,0 18000,637 0,637">
          <text:p/>
        </draw:polygon>
        <draw:frame draw:style-name="gr54" draw:text-style-name="P11" draw:layer="layout" svg:width="7.64cm" svg:height="0.746cm" svg:x="1.712cm" svg:y="6.589cm">
          <draw:text-box>
            <text:p text:style-name="P10"><text:span text:style-name="T5">7. </text:span><text:span text:style-name="T5">定制服务 </text:span><text:span text:style-name="T5">/ Customization</text:span></text:p>
          </draw:text-box>
        </draw:frame>
        <draw:frame draw:style-name="gr55" draw:text-style-name="P13" draw:layer="layout" svg:width="1.423cm" svg:height="0.399cm" svg:x="4.43cm" svg:y="7.786cm">
          <draw:text-box>
            <text:p text:style-name="P12"><text:span text:style-name="T6">项目 </text:span><text:span text:style-name="T6">Item</text:span></text:p>
          </draw:text-box>
        </draw:frame>
        <draw:frame draw:style-name="gr45" draw:text-style-name="P13" draw:layer="layout" svg:width="2.415cm" svg:height="0.399cm" svg:x="12.936cm" svg:y="7.786cm">
          <draw:text-box>
            <text:p text:style-name="P12"><text:span text:style-name="T6">描述 </text:span><text:span text:style-name="T6">Description</text:span></text:p>
          </draw:text-box>
        </draw:frame>
        <draw:frame draw:style-name="gr56" draw:text-style-name="P15" draw:layer="layout" svg:width="2.314cm" svg:height="0.378cm" svg:x="3.987cm" svg:y="8.422cm">
          <draw:text-box>
            <text:p text:style-name="P14"><text:span text:style-name="T7">尺寸 </text:span><text:span text:style-name="T7">Dimensions</text:span></text:p>
          </draw:text-box>
        </draw:frame>
        <draw:frame draw:style-name="gr57" draw:text-style-name="P15" draw:layer="layout" svg:width="1.42cm" svg:height="0.378cm" svg:x="13.394cm" svg:y="8.422cm">
          <draw:text-box>
            <text:p text:style-name="P16"><text:span text:style-name="T7">可定制尺寸</text:span></text:p>
          </draw:text-box>
        </draw:frame>
        <draw:frame draw:style-name="gr58" draw:text-style-name="P15" draw:layer="layout" svg:width="2.125cm" svg:height="0.378cm" svg:x="4.081cm" svg:y="9.022cm">
          <draw:text-box>
            <text:p text:style-name="P14"><text:span text:style-name="T7">包装 </text:span><text:span text:style-name="T7">Packaging</text:span></text:p>
          </draw:text-box>
        </draw:frame>
        <draw:frame draw:style-name="gr59" draw:text-style-name="P15" draw:layer="layout" svg:width="2.555cm" svg:height="0.378cm" svg:x="12.83cm" svg:y="9.022cm">
          <draw:text-box>
            <text:p text:style-name="P16"><text:span text:style-name="T7">定制包装数量和方式</text:span></text:p>
          </draw:text-box>
        </draw:frame>
        <draw:frame draw:style-name="gr60" draw:text-style-name="P15" draw:layer="layout" svg:width="1.463cm" svg:height="0.378cm" svg:x="4.41cm" svg:y="9.622cm">
          <draw:text-box>
            <text:p text:style-name="P14"><text:span text:style-name="T7">LOGO</text:span><text:span text:style-name="T7">印刷</text:span></text:p>
          </draw:text-box>
        </draw:frame>
        <draw:frame draw:style-name="gr61" draw:text-style-name="P15" draw:layer="layout" svg:width="3.165cm" svg:height="0.378cm" svg:x="12.564cm" svg:y="9.622cm">
          <draw:text-box>
            <text:p text:style-name="P14"><text:span text:style-name="T7">包装袋上印刷品牌</text:span><text:span text:style-name="T7">LOGO</text:span></text:p>
          </draw:text-box>
        </draw:frame>
        <draw:frame draw:style-name="gr62" draw:text-style-name="P15" draw:layer="layout" svg:width="2.929cm" svg:height="0.378cm" svg:x="3.681cm" svg:y="10.221cm">
          <draw:text-box>
            <text:p text:style-name="P14"><text:span text:style-name="T7">切割方式 </text:span><text:span text:style-name="T7">Cut Method</text:span></text:p>
          </draw:text-box>
        </draw:frame>
        <draw:line draw:style-name="gr39" draw:text-style-name="P4" draw:layer="layout" svg:x1="1.5cm" svg:y1="7.697cm" svg:x2="19.499cm" svg:y2="7.697cm">
          <text:p/>
        </draw:line>
        <draw:line draw:style-name="gr39" draw:text-style-name="P4" draw:layer="layout" svg:x1="1.5cm" svg:y1="10.731cm" svg:x2="19.499cm" svg:y2="10.731cm">
          <text:p/>
        </draw:line>
        <draw:line draw:style-name="gr39" draw:text-style-name="P4" draw:layer="layout" svg:x1="1.5cm" svg:y1="10.731cm" svg:x2="1.5cm" svg:y2="7.697cm">
          <text:p/>
        </draw:line>
        <draw:line draw:style-name="gr39" draw:text-style-name="P4" draw:layer="layout" svg:x1="19.499cm" svg:y1="10.731cm" svg:x2="19.499cm" svg:y2="7.697cm">
          <text:p/>
        </draw:line>
        <draw:line draw:style-name="gr39" draw:text-style-name="P4" draw:layer="layout" svg:x1="1.5cm" svg:y1="8.332cm" svg:x2="19.499cm" svg:y2="8.332cm">
          <text:p/>
        </draw:line>
        <draw:line draw:style-name="gr39" draw:text-style-name="P4" draw:layer="layout" svg:x1="1.5cm" svg:y1="8.932cm" svg:x2="19.499cm" svg:y2="8.932cm">
          <text:p/>
        </draw:line>
        <draw:line draw:style-name="gr39" draw:text-style-name="P4" draw:layer="layout" svg:x1="1.5cm" svg:y1="9.532cm" svg:x2="19.499cm" svg:y2="9.532cm">
          <text:p/>
        </draw:line>
        <draw:line draw:style-name="gr39" draw:text-style-name="P4" draw:layer="layout" svg:x1="1.5cm" svg:y1="10.131cm" svg:x2="19.499cm" svg:y2="10.131cm">
          <text:p/>
        </draw:line>
        <draw:line draw:style-name="gr39" draw:text-style-name="P4" draw:layer="layout" svg:x1="8.7cm" svg:y1="10.731cm" svg:x2="8.7cm" svg:y2="7.697cm">
          <text:p/>
        </draw:line>
        <draw:frame draw:style-name="gr63" draw:text-style-name="P15" draw:layer="layout" svg:width="2.529cm" svg:height="0.378cm" svg:x="12.992cm" svg:y="10.221cm">
          <draw:text-box>
            <text:p text:style-name="P16"><text:span text:style-name="T7">激光</text:span><text:span text:style-name="T7">/</text:span><text:span text:style-name="T7">超声波</text:span><text:span text:style-name="T7">/</text:span><text:span text:style-name="T7">冷切</text:span></text:p>
          </draw:text-box>
        </draw:frame>
        <draw:polygon draw:style-name="gr42" draw:text-style-name="P9" draw:layer="layout" svg:width="17.999cm" svg:height="0.636cm" svg:x="1.5cm" svg:y="12.607cm" svg:viewBox="0 0 18000 637" draw:points="0,0 18000,0 18000,637 0,637">
          <text:p/>
        </draw:polygon>
        <draw:frame draw:style-name="gr64" draw:text-style-name="P11" draw:layer="layout" svg:width="7.856cm" svg:height="0.746cm" svg:x="1.712cm" svg:y="11.499cm">
          <draw:text-box>
            <text:p text:style-name="P10"><text:span text:style-name="T5">8. </text:span><text:span text:style-name="T5">认证与质量 </text:span><text:span text:style-name="T5">/ Certifications</text:span></text:p>
          </draw:text-box>
        </draw:frame>
        <draw:frame draw:style-name="gr24" draw:text-style-name="P13" draw:layer="layout" svg:width="0.603cm" svg:height="0.399cm" svg:x="3.45cm" svg:y="12.696cm">
          <draw:text-box>
            <text:p text:style-name="P17"><text:span text:style-name="T6">认证</text:span></text:p>
          </draw:text-box>
        </draw:frame>
        <draw:frame draw:style-name="gr24" draw:text-style-name="P13" draw:layer="layout" svg:width="0.603cm" svg:height="0.399cm" svg:x="7.95cm" svg:y="12.696cm">
          <draw:text-box>
            <text:p text:style-name="P17"><text:span text:style-name="T6">状态</text:span></text:p>
          </draw:text-box>
        </draw:frame>
        <draw:frame draw:style-name="gr24" draw:text-style-name="P13" draw:layer="layout" svg:width="0.603cm" svg:height="0.399cm" svg:x="14.7cm" svg:y="12.696cm">
          <draw:text-box>
            <text:p text:style-name="P17"><text:span text:style-name="T6">备注</text:span></text:p>
          </draw:text-box>
        </draw:frame>
        <draw:frame draw:style-name="gr65" draw:text-style-name="P15" draw:layer="layout" svg:width="0.48cm" svg:height="0.378cm" svg:x="3.512cm" svg:y="13.332cm">
          <draw:text-box>
            <text:p text:style-name="P14"><text:span text:style-name="T7">ISO</text:span></text:p>
          </draw:text-box>
        </draw:frame>
        <draw:frame draw:style-name="gr66" draw:text-style-name="P15" draw:layer="layout" svg:width="0.853cm" svg:height="0.378cm" svg:x="7.827cm" svg:y="13.332cm">
          <draw:text-box>
            <text:p text:style-name="P16"><text:span text:style-name="T7">待确认</text:span></text:p>
          </draw:text-box>
        </draw:frame>
        <draw:frame draw:style-name="gr67" draw:text-style-name="P15" draw:layer="layout" svg:width="1.704cm" svg:height="0.378cm" svg:x="14.153cm" svg:y="13.332cm">
          <draw:text-box>
            <text:p text:style-name="P16"><text:span text:style-name="T7">待与工厂确认</text:span></text:p>
          </draw:text-box>
        </draw:frame>
        <draw:frame draw:style-name="gr68" draw:text-style-name="P15" draw:layer="layout" svg:width="0.54cm" svg:height="0.378cm" svg:x="3.482cm" svg:y="13.932cm">
          <draw:text-box>
            <text:p text:style-name="P14"><text:span text:style-name="T7">SGS</text:span></text:p>
          </draw:text-box>
        </draw:frame>
        <draw:frame draw:style-name="gr66" draw:text-style-name="P15" draw:layer="layout" svg:width="0.853cm" svg:height="0.378cm" svg:x="7.827cm" svg:y="13.932cm">
          <draw:text-box>
            <text:p text:style-name="P16"><text:span text:style-name="T7">待确认</text:span></text:p>
          </draw:text-box>
        </draw:frame>
        <draw:frame draw:style-name="gr53" draw:text-style-name="P15" draw:layer="layout" svg:width="2.271cm" svg:height="0.378cm" svg:x="13.871cm" svg:y="13.932cm">
          <draw:text-box>
            <text:p text:style-name="P16"><text:span text:style-name="T7">可提供第三方检测</text:span></text:p>
          </draw:text-box>
        </draw:frame>
        <draw:frame draw:style-name="gr69" draw:text-style-name="P15" draw:layer="layout" svg:width="0.751cm" svg:height="0.378cm" svg:x="3.378cm" svg:y="14.532cm">
          <draw:text-box>
            <text:p text:style-name="P14"><text:span text:style-name="T7">RoHS</text:span></text:p>
          </draw:text-box>
        </draw:frame>
        <draw:frame draw:style-name="gr66" draw:text-style-name="P15" draw:layer="layout" svg:width="0.853cm" svg:height="0.378cm" svg:x="7.827cm" svg:y="14.532cm">
          <draw:text-box>
            <text:p text:style-name="P16"><text:span text:style-name="T7">待确认</text:span></text:p>
          </draw:text-box>
        </draw:frame>
        <draw:line draw:style-name="gr39" draw:text-style-name="P4" draw:layer="layout" svg:x1="1.5cm" svg:y1="12.607cm" svg:x2="19.499cm" svg:y2="12.607cm">
          <text:p/>
        </draw:line>
        <draw:line draw:style-name="gr39" draw:text-style-name="P4" draw:layer="layout" svg:x1="1.5cm" svg:y1="15.041cm" svg:x2="19.499cm" svg:y2="15.041cm">
          <text:p/>
        </draw:line>
        <draw:line draw:style-name="gr39" draw:text-style-name="P4" draw:layer="layout" svg:x1="1.5cm" svg:y1="15.041cm" svg:x2="1.5cm" svg:y2="12.607cm">
          <text:p/>
        </draw:line>
        <draw:line draw:style-name="gr39" draw:text-style-name="P4" draw:layer="layout" svg:x1="19.499cm" svg:y1="15.041cm" svg:x2="19.499cm" svg:y2="12.607cm">
          <text:p/>
        </draw:line>
        <draw:line draw:style-name="gr39" draw:text-style-name="P4" draw:layer="layout" svg:x1="1.5cm" svg:y1="13.242cm" svg:x2="19.499cm" svg:y2="13.242cm">
          <text:p/>
        </draw:line>
        <draw:line draw:style-name="gr39" draw:text-style-name="P4" draw:layer="layout" svg:x1="1.5cm" svg:y1="13.842cm" svg:x2="19.499cm" svg:y2="13.842cm">
          <text:p/>
        </draw:line>
        <draw:line draw:style-name="gr39" draw:text-style-name="P4" draw:layer="layout" svg:x1="1.5cm" svg:y1="14.442cm" svg:x2="19.499cm" svg:y2="14.442cm">
          <text:p/>
        </draw:line>
        <draw:line draw:style-name="gr39" draw:text-style-name="P4" draw:layer="layout" svg:x1="6cm" svg:y1="15.041cm" svg:x2="6cm" svg:y2="12.607cm">
          <text:p/>
        </draw:line>
        <draw:line draw:style-name="gr39" draw:text-style-name="P4" draw:layer="layout" svg:x1="10.499cm" svg:y1="15.041cm" svg:x2="10.499cm" svg:y2="12.607cm">
          <text:p/>
        </draw:line>
        <draw:frame draw:style-name="gr67" draw:text-style-name="P15" draw:layer="layout" svg:width="1.704cm" svg:height="0.378cm" svg:x="14.153cm" svg:y="14.532cm">
          <draw:text-box>
            <text:p text:style-name="P16"><text:span text:style-name="T7">建议出口欧盟</text:span></text:p>
          </draw:text-box>
        </draw:frame>
        <draw:frame draw:style-name="gr70" draw:text-style-name="P19" draw:layer="layout" svg:width="1.908cm" svg:height="0.56cm" svg:x="1.712cm" svg:y="15.617cm">
          <draw:text-box>
            <text:p text:style-name="P18"><text:span text:style-name="T8">产品优势</text:span><text:span text:style-name="T8">:</text:span></text:p>
          </draw:text-box>
        </draw:frame>
        <draw:frame draw:style-name="gr71" draw:text-style-name="P21" draw:layer="layout" svg:width="5.352cm" svg:height="0.446cm" svg:x="1.712cm" svg:y="16.422cm">
          <draw:text-box>
            <text:p text:style-name="P20"><text:span text:style-name="T4">- </text:span><text:span text:style-name="T4">工厂直供价格，目标市场竞争力强</text:span></text:p>
          </draw:text-box>
        </draw:frame>
        <draw:frame draw:style-name="gr72" draw:text-style-name="P21" draw:layer="layout" svg:width="4.348cm" svg:height="0.446cm" svg:x="1.712cm" svg:y="17.066cm">
          <draw:text-box>
            <text:p text:style-name="P20"><text:span text:style-name="T4">- </text:span><text:span text:style-name="T4">双面针织结构，低微尘排放</text:span></text:p>
          </draw:text-box>
        </draw:frame>
        <draw:frame draw:style-name="gr73" draw:text-style-name="P21" draw:layer="layout" svg:width="4.014cm" svg:height="0.446cm" svg:x="1.712cm" svg:y="17.71cm">
          <draw:text-box>
            <text:p text:style-name="P20"><text:span text:style-name="T4">- </text:span><text:span text:style-name="T4">激光封边，减少纤维脱落</text:span></text:p>
          </draw:text-box>
        </draw:frame>
        <draw:frame draw:style-name="gr74" draw:text-style-name="P21" draw:layer="layout" svg:width="5.068cm" svg:height="0.446cm" svg:x="1.712cm" svg:y="18.354cm">
          <draw:text-box>
            <text:p text:style-name="P20"><text:span text:style-name="T4">- </text:span><text:span text:style-name="T4">灵活定制：尺寸、包装、</text:span><text:span text:style-name="T4">LOGO</text:span></text:p>
          </draw:text-box>
        </draw:frame>
      </draw:page>
      <draw:page draw:name="page8" draw:style-name="dp1" draw:master-page-name="master-page70">
        <draw:frame draw:style-name="gr75" draw:text-style-name="P11" draw:layer="layout" svg:width="9.203cm" svg:height="0.746cm" svg:x="1.712cm" svg:y="1.679cm">
          <draw:text-box>
            <text:p text:style-name="P10"><text:span text:style-name="T5">9. </text:span><text:span text:style-name="T5">联系方式 </text:span><text:span text:style-name="T5">/ Contact Information</text:span></text:p>
          </draw:text-box>
        </draw:frame>
        <draw:frame draw:style-name="gr76" draw:text-style-name="P19" draw:layer="layout" svg:width="5.929cm" svg:height="0.56cm" svg:x="1.7cm" svg:y="2.85cm">
          <draw:text-box>
            <text:p text:style-name="P22"><text:span text:style-name="T8">深圳永新源无尘布产品有限公司</text:span></text:p>
          </draw:text-box>
        </draw:frame>
        <draw:frame draw:style-name="gr77" draw:text-style-name="P24" draw:layer="layout" svg:width="9.494cm" svg:height="1.25cm" svg:x="1.7cm" svg:y="3.6cm">
          <draw:text-box>
            <text:p text:style-name="P23"><text:span text:style-name="T8"><text:s text:c="2"/>Shenzhen <text:s text:c="2"/>Yongxinyuan Cleanroom Products</text:span></text:p>
          </draw:text-box>
        </draw:frame>
        <draw:frame draw:style-name="gr78" draw:text-style-name="P21" draw:layer="layout" svg:width="1.51cm" svg:height="0.446cm" svg:x="1.7cm" svg:y="4.654cm">
          <draw:text-box>
            <text:p text:style-name="P20"><text:span text:style-name="T4">联系信息</text:span><text:span text:style-name="T4">:</text:span></text:p>
          </draw:text-box>
        </draw:frame>
        <draw:frame draw:style-name="gr79" draw:text-style-name="P21" draw:layer="layout" svg:width="6.418cm" svg:height="0.446cm" svg:x="1.532cm" svg:y="5.404cm">
          <draw:text-box>
            <text:p text:style-name="P20"><text:span text:style-name="T4">地址</text:span><text:span text:style-name="T4">/Address: [_</text:span><text:span text:style-name="T4">中国广东省深圳龙华区</text:span><text:span text:style-name="T4">_]</text:span></text:p>
          </draw:text-box>
        </draw:frame>
        <draw:frame draw:style-name="gr80" draw:text-style-name="P21" draw:layer="layout" svg:width="5.734cm" svg:height="0.75cm" svg:x="1.7cm" svg:y="6.1cm">
          <draw:text-box>
            <text:p text:style-name="P20"><text:span text:style-name="T4">电话</text:span><text:span text:style-name="T4">/Phone: [__+8613714185883__]</text:span></text:p>
          </draw:text-box>
        </draw:frame>
        <draw:frame draw:style-name="gr81" draw:text-style-name="P21" draw:layer="layout" svg:width="5.957cm" svg:height="0.446cm" svg:x="1.743cm" svg:y="6.904cm">
          <draw:text-box>
            <text:p text:style-name="P20"><text:span text:style-name="T4">邮箱</text:span><text:span text:style-name="T4">/Email: [__cmdcsz@gmail.com__]</text:span></text:p>
          </draw:text-box>
        </draw:frame>
        <draw:frame draw:style-name="gr82" draw:text-style-name="P21" draw:layer="layout" svg:width="10.391cm" svg:height="0.446cm" svg:x="1.7cm" svg:y="7.6cm">
          <draw:text-box>
            <text:p text:style-name="P20"><text:span text:style-name="T4">网站</text:span><text:span text:style-name="T4">/Website: https://cmdcsz-collab.github.io/cleanroom-wiper/</text:span></text:p>
          </draw:text-box>
        </draw:frame>
        <draw:frame draw:style-name="gr83" draw:text-style-name="P21" draw:layer="layout" svg:width="5.475cm" svg:height="0.446cm" svg:x="1.725cm" svg:y="8.35cm">
          <draw:text-box>
            <text:p text:style-name="P20"><text:span text:style-name="T4">WhatsApp: [__+8613714185883__]</text:span></text:p>
          </draw:text-box>
        </draw:frame>
        <draw:frame draw:style-name="gr84" draw:text-style-name="P19" draw:layer="layout" svg:width="5.304cm" svg:height="0.56cm" svg:x="1.7cm" svg:y="9.1cm">
          <draw:text-box>
            <text:p text:style-name="P18"><text:span text:style-name="T8">目标市场 </text:span><text:span text:style-name="T8">/ Target Markets</text:span></text:p>
          </draw:text-box>
        </draw:frame>
        <draw:frame draw:style-name="gr85" draw:text-style-name="P21" draw:layer="layout" svg:width="5.061cm" svg:height="0.516cm" svg:x="1.95cm" svg:y="10.1cm">
          <draw:text-box>
            <text:p text:style-name="P20"><text:span text:style-name="T4">- </text:span><text:span text:style-name="T4">土耳其</text:span><text:span text:style-name="T4">: DS</text:span><text:span text:style-name="T4">系列 </text:span><text:span text:style-name="T4">6x6, 9x9</text:span><text:span text:style-name="T4">英寸</text:span></text:p>
          </draw:text-box>
        </draw:frame>
        <draw:frame draw:style-name="gr86" draw:text-style-name="P21" draw:layer="layout" svg:width="7.122cm" svg:height="0.516cm" svg:x="1.95cm" svg:y="10.846cm">
          <draw:text-box>
            <text:p text:style-name="P20"><text:span text:style-name="T4">- </text:span><text:span text:style-name="T4">中东</text:span><text:span text:style-name="T4">(</text:span><text:span text:style-name="T4">阿联酋</text:span><text:span text:style-name="T4">/</text:span><text:span text:style-name="T4">沙特</text:span><text:span text:style-name="T4">): DS</text:span><text:span text:style-name="T4">系列 </text:span><text:span text:style-name="T4">6x6, 9x9</text:span><text:span text:style-name="T4">英寸</text:span></text:p>
          </draw:text-box>
        </draw:frame>
        <draw:frame draw:style-name="gr87" draw:text-style-name="P21" draw:layer="layout" svg:width="5.456cm" svg:height="0.517cm" svg:x="1.95cm" svg:y="11.592cm">
          <draw:text-box>
            <text:p text:style-name="P20"><text:span text:style-name="T4">- </text:span><text:span text:style-name="T4">东欧</text:span><text:span text:style-name="T4">(</text:span><text:span text:style-name="T4">波兰</text:span><text:span text:style-name="T4">/</text:span><text:span text:style-name="T4">捷克</text:span><text:span text:style-name="T4">): DS + KH</text:span><text:span text:style-name="T4">系列</text:span></text:p>
          </draw:text-box>
        </draw:frame>
        <draw:frame draw:style-name="gr88" draw:text-style-name="P21" draw:layer="layout" svg:width="5.831cm" svg:height="0.517cm" svg:x="1.95cm" svg:y="12.338cm">
          <draw:text-box>
            <text:p text:style-name="P20"><text:span text:style-name="T4">- </text:span><text:span text:style-name="T4">俄罗斯</text:span><text:span text:style-name="T4">/</text:span><text:span text:style-name="T4">独联体</text:span><text:span text:style-name="T4">: KH</text:span><text:span text:style-name="T4">系列工业擦拭布</text:span></text:p>
          </draw:text-box>
        </draw:frame>
        <draw:frame draw:style-name="gr89" draw:text-style-name="P21" draw:layer="layout" svg:width="3.368cm" svg:height="0.516cm" svg:x="1.95cm" svg:y="13.084cm">
          <draw:text-box>
            <text:p text:style-name="P20"><text:span text:style-name="T4">- </text:span><text:span text:style-name="T4">其他市场</text:span><text:span text:style-name="T4">: </text:span><text:span text:style-name="T4">欢迎垂询</text:span></text:p>
          </draw:text-box>
        </draw:frame>
        <draw:frame draw:style-name="gr90" draw:text-style-name="P15" draw:layer="layout" svg:width="5.112cm" svg:height="0.378cm" svg:x="7.95cm" svg:y="14.222cm">
          <draw:text-box>
            <text:p text:style-name="P14"><text:span text:style-name="T9">* </text:span><text:span text:style-name="T9">所有规格仅供参考，以实际产品为准。</text:span></text:p>
          </draw:text-box>
        </draw:frame>
        <draw:frame draw:style-name="gr91" draw:text-style-name="P15" draw:layer="layout" svg:width="4.738cm" svg:height="0.378cm" svg:x="8.125cm" svg:y="16.091cm">
          <draw:text-box>
            <text:p text:style-name="P14"><text:span text:style-name="T9">Version V2.0 | Created: 2026-07-05</text:span></text:p>
          </draw:text-box>
        </draw:frame>
      </draw:page>
      <draw:page draw:name="page6" draw:style-name="dp1" draw:master-page-name="master-page52">
        <draw:frame draw:style-name="gr92" draw:text-style-name="P25" draw:layer="layout" svg:width="15.924cm" svg:height="20.237cm" svg:x="2.176cm" svg:y="3.468cm">
          <draw:image xlink:href="Pictures/100000000000025A000002FD61CE54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15T21:18:14.138776300</dc:date>
    <meta:editing-duration>PT13M59S</meta:editing-duration>
    <meta:editing-cycles>2</meta:editing-cycles>
    <meta:generator>LibreOffice/26.2.4.2$Windows_X86_64 LibreOffice_project/0229ac93fcf0d7cbc6376066c6f35021cef002dc</meta:generator>
    <meta:print-date>2026-07-15T21:18:08.001621900</meta:print-date>
    <meta:printed-by>PDF 文件</meta:printed-by>
    <meta:document-statistic meta:object-count="191"/>
  </office:meta>
</office:document-meta>
</file>